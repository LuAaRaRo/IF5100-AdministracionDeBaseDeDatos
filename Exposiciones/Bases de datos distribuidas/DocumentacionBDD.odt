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16C000001795724E14B.png" manifest:media-type="image/pn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ptos" svg:font-family="Aptos"/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 loext:decorative="false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loext:decorative="false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2pt" style:font-size-asian="12pt" style:font-size-complex="12pt"/>
    </style:style>
    <style:style style:name="P3" style:family="paragraph">
      <loext:graphic-properties draw:fill="none"/>
    </style:style>
    <style:style style:name="T1" style:family="text">
      <style:text-properties fo:color="#000000" loext:opacity="100%" style:font-name="Aptos" fo:font-size="12pt" fo:font-weight="normal" style:font-name-asian="Aptos" style:font-size-asian="12pt" style:font-weight-asian="normal" style:font-name-complex="Aptos" style:font-size-complex="12pt" style:font-weight-complex="normal"/>
    </style:style>
    <style:style style:name="T2" style:family="text">
      <style:text-properties fo:color="#000000" loext:opacity="100%" style:font-name="Times New Roman" fo:font-size="12pt" fo:font-weight="normal" style:font-name-asian="Times New Roman" style:font-size-asian="12pt" style:font-weight-asian="normal" style:font-name-complex="Times New Roman" style:font-size-complex="12pt" style:font-weight-complex="normal"/>
    </style:style>
    <style:style style:name="T3" style:family="text">
      <style:text-properties fo:color="#000000" loext:opacity="100%" style:font-name="Times New Roman" fo:font-size="12pt" fo:font-weight="bold" style:font-name-asian="Times New Roman" style:font-size-asian="12pt" style:font-weight-asian="bold" style:font-name-complex="Times New Roman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0.422cm" svg:height="0.497cm" svg:x="2.532cm" svg:y="1.275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97cm" svg:x="10.5cm" svg:y="1.275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97cm" svg:x="18.238cm" svg:y="1.275cm">
          <draw:text-box>
            <text:p text:style-name="P1"><text:span text:style-name="T1">1</text:span><text:span text:style-name="T1"> </text:span></text:p>
          </draw:text-box>
        </draw:frame>
        <draw:frame draw:style-name="gr1" draw:text-style-name="P2" draw:layer="layout" svg:width="0.422cm" svg:height="0.497cm" svg:x="2.541cm" svg:y="1.804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97cm" svg:x="2.532cm" svg:y="27.396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97cm" svg:x="10.5cm" svg:y="27.396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97cm" svg:x="18.467cm" svg:y="27.396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97cm" svg:x="2.541cm" svg:y="27.926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97cm" svg:x="12.82cm" svg:y="6.938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4.528cm" svg:height="0.471cm" svg:x="8.241cm" svg:y="7.44cm">
          <draw:text-box>
            <text:p text:style-name="P1"><text:span text:style-name="T2">U</text:span><text:span text:style-name="T2">n</text:span><text:span text:style-name="T2">i</text:span><text:span text:style-name="T2">v</text:span><text:span text:style-name="T2">e</text:span><text:span text:style-name="T2">r</text:span><text:span text:style-name="T2">s</text:span><text:span text:style-name="T2">i</text:span><text:span text:style-name="T2">d</text:span><text:span text:style-name="T2">a</text:span><text:span text:style-name="T2">d</text:span><text:span text:style-name="T2"> </text:span><text:span text:style-name="T2">d</text:span><text:span text:style-name="T2">e</text:span><text:span text:style-name="T2"> </text:span><text:span text:style-name="T2">C</text:span><text:span text:style-name="T2">o</text:span><text:span text:style-name="T2">s</text:span><text:span text:style-name="T2">t</text:span><text:span text:style-name="T2">a</text:span><text:span text:style-name="T2"> </text:span><text:span text:style-name="T2">R</text:span><text:span text:style-name="T2">i</text:span><text:span text:style-name="T2">c</text:span><text:span text:style-name="T2">a</text:span></text:p>
          </draw:text-box>
        </draw:frame>
        <draw:frame draw:style-name="gr1" draw:text-style-name="P2" draw:layer="layout" svg:width="0.422cm" svg:height="0.497cm" svg:x="12.767cm" svg:y="7.424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2.941cm" svg:height="0.471cm" svg:x="9.035cm" svg:y="8.004cm">
          <draw:text-box>
            <text:p text:style-name="P1"><text:span text:style-name="T2">S</text:span><text:span text:style-name="T2">e</text:span><text:span text:style-name="T2">d</text:span><text:span text:style-name="T2">e</text:span><text:span text:style-name="T2"> </text:span><text:span text:style-name="T2">d</text:span><text:span text:style-name="T2">e</text:span><text:span text:style-name="T2">l </text:span><text:span text:style-name="T2">P</text:span><text:span text:style-name="T2">a</text:span><text:span text:style-name="T2">c</text:span><text:span text:style-name="T2">i</text:span><text:span text:style-name="T2">f</text:span><text:span text:style-name="T2">i</text:span><text:span text:style-name="T2">c</text:span><text:span text:style-name="T2">o</text:span></text:p>
          </draw:text-box>
        </draw:frame>
        <draw:frame draw:style-name="gr1" draw:text-style-name="P2" draw:layer="layout" svg:width="0.422cm" svg:height="0.497cm" svg:x="11.973cm" svg:y="7.988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97cm" svg:x="10.5cm" svg:y="8.553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6.008cm" svg:height="0.471cm" svg:x="7.5cm" svg:y="9.45cm">
          <draw:text-box>
            <text:p text:style-name="P1"><text:span text:style-name="T2">C</text:span><text:span text:style-name="T2">a</text:span><text:span text:style-name="T2">r</text:span><text:span text:style-name="T2">r</text:span><text:span text:style-name="T2">e</text:span><text:span text:style-name="T2">r</text:span><text:span text:style-name="T2">a</text:span><text:span text:style-name="T2"> </text:span><text:span text:style-name="T2">d</text:span><text:span text:style-name="T2">e</text:span><text:span text:style-name="T2"> </text:span><text:span text:style-name="T2">I</text:span><text:span text:style-name="T2">n</text:span><text:span text:style-name="T2">f</text:span><text:span text:style-name="T2">o</text:span><text:span text:style-name="T2">r</text:span><text:span text:style-name="T2">m</text:span><text:span text:style-name="T2">á</text:span><text:span text:style-name="T2">t</text:span><text:span text:style-name="T2">i</text:span><text:span text:style-name="T2">c</text:span><text:span text:style-name="T2">a</text:span><text:span text:style-name="T2"> </text:span><text:span text:style-name="T2">E</text:span><text:span text:style-name="T2">m</text:span><text:span text:style-name="T2">p</text:span><text:span text:style-name="T2">r</text:span><text:span text:style-name="T2">e</text:span><text:span text:style-name="T2">s</text:span><text:span text:style-name="T2">a</text:span><text:span text:style-name="T2">r</text:span><text:span text:style-name="T2">i</text:span><text:span text:style-name="T2">a</text:span><text:span text:style-name="T2">l</text:span></text:p>
          </draw:text-box>
        </draw:frame>
        <draw:frame draw:style-name="gr1" draw:text-style-name="P2" draw:layer="layout" svg:width="0.422cm" svg:height="0.497cm" svg:x="13.509cm" svg:y="9.435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97cm" svg:x="10.5cm" svg:y="9.999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7.221cm" svg:height="0.471cm" svg:x="6.891cm" svg:y="10.898cm">
          <draw:text-box>
            <text:p text:style-name="P1"><text:span text:style-name="T2">IF5100-Administracion De Base De Datos</text:span></text:p>
          </draw:text-box>
        </draw:frame>
        <draw:frame draw:style-name="gr1" draw:text-style-name="P2" draw:layer="layout" svg:width="0.422cm" svg:height="0.497cm" svg:x="14.117cm" svg:y="10.882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71cm" svg:x="10.5cm" svg:y="11.462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422cm" svg:height="0.497cm" svg:x="10.5cm" svg:y="12.02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4.14cm" svg:height="0.471cm" svg:x="8.435cm" svg:y="12.917cm">
          <draw:text-box>
            <text:p text:style-name="P1"><text:span text:style-name="T2">Docente: Josué Quesada</text:span></text:p>
          </draw:text-box>
        </draw:frame>
        <draw:frame draw:style-name="gr1" draw:text-style-name="P2" draw:layer="layout" svg:width="0.422cm" svg:height="0.497cm" svg:x="12.573cm" svg:y="12.902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97cm" svg:x="10.5cm" svg:y="13.467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1.883cm" svg:height="0.471cm" svg:x="9.565cm" svg:y="14.364cm">
          <draw:text-box>
            <text:p text:style-name="P1"><text:span text:style-name="T2">Integrantes</text:span></text:p>
          </draw:text-box>
        </draw:frame>
        <draw:frame draw:style-name="gr1" draw:text-style-name="P2" draw:layer="layout" svg:width="0.422cm" svg:height="0.497cm" svg:x="11.444cm" svg:y="14.349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97cm" svg:x="10.5cm" svg:y="14.913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6.293cm" svg:height="0.471cm" svg:x="7.359cm" svg:y="15.811cm">
          <draw:text-box>
            <text:p text:style-name="P1"><text:span text:style-name="T2">Cristobal Rodríguez Salgado C4J203</text:span></text:p>
          </draw:text-box>
        </draw:frame>
        <draw:frame draw:style-name="gr1" draw:text-style-name="P2" draw:layer="layout" svg:width="0.422cm" svg:height="0.497cm" svg:x="13.65cm" svg:y="15.795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6.409cm" svg:height="0.471cm" svg:x="7.297cm" svg:y="16.376cm">
          <draw:text-box>
            <text:p text:style-name="P1"><text:span text:style-name="T2">Yeshua Chavarria Chinchilla C4E191</text:span></text:p>
          </draw:text-box>
        </draw:frame>
        <draw:frame draw:style-name="gr1" draw:text-style-name="P2" draw:layer="layout" svg:width="0.422cm" svg:height="0.497cm" svg:x="13.703cm" svg:y="16.361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5.329cm" svg:height="0.471cm" svg:x="7.835cm" svg:y="16.949cm">
          <draw:text-box>
            <text:p text:style-name="P1"><text:span text:style-name="T2">Deyron Bustos Quiros C4D456</text:span></text:p>
          </draw:text-box>
        </draw:frame>
        <draw:frame draw:style-name="gr1" draw:text-style-name="P2" draw:layer="layout" svg:width="0.422cm" svg:height="0.497cm" svg:x="13.164cm" svg:y="16.934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7.031cm" svg:height="0.497cm" svg:x="7.571cm" svg:y="17.498cm">
          <draw:text-box>
            <text:p text:style-name="P1"><text:span text:style-name="T1">Kervin Gutierrez Chaves C4F790 </text:span></text:p>
          </draw:text-box>
        </draw:frame>
        <draw:frame draw:style-name="gr1" draw:text-style-name="P2" draw:layer="layout" svg:width="0.422cm" svg:height="0.497cm" svg:x="10.5cm" svg:y="18.38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2.988cm" svg:height="0.471cm" svg:x="9.008cm" svg:y="19.279cm">
          <draw:text-box>
            <text:p text:style-name="P1"><text:span text:style-name="T2">I ciclo - año 2026</text:span></text:p>
          </draw:text-box>
        </draw:frame>
        <draw:frame draw:style-name="gr1" draw:text-style-name="P2" draw:layer="layout" svg:width="0.422cm" svg:height="0.497cm" svg:x="12cm" svg:y="19.263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97cm" svg:x="10.5cm" svg:y="19.827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97cm" svg:x="10.5cm" svg:y="20.709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4.399cm" svg:height="0.471cm" svg:x="8.303cm" svg:y="21.607cm">
          <draw:text-box>
            <text:p text:style-name="P1"><text:span text:style-name="T2">Proyecto de Investigación</text:span></text:p>
          </draw:text-box>
        </draw:frame>
        <draw:frame draw:style-name="gr1" draw:text-style-name="P2" draw:layer="layout" svg:width="0.422cm" svg:height="0.497cm" svg:x="12.705cm" svg:y="21.592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97cm" svg:x="10.5cm" svg:y="22.165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4.411cm" svg:height="0.471cm" svg:x="8.294cm" svg:y="23.063cm">
          <draw:text-box>
            <text:p text:style-name="P1"><text:span text:style-name="T2">Base de datos distribuidas</text:span></text:p>
          </draw:text-box>
        </draw:frame>
        <draw:frame draw:style-name="gr1" draw:text-style-name="P2" draw:layer="layout" svg:width="0.422cm" svg:height="0.497cm" svg:x="12.705cm" svg:y="23.047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97cm" svg:x="2.541cm" svg:y="23.612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97cm" svg:x="2.541cm" svg:y="24.494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97cm" svg:x="2.541cm" svg:y="25.377cm">
          <draw:text-box>
            <text:p text:style-name="P1"><text:span text:style-name="T1"><text:s/></text:span></text:p>
          </draw:text-box>
        </draw:frame>
        <draw:frame draw:style-name="gr2" draw:text-style-name="P3" draw:layer="layout" svg:width="4.629cm" svg:height="4.788cm" svg:x="8.185cm" svg:y="2.54cm">
          <draw:image xlink:href="Pictures/100000010000016C000001795724E14B.png" xlink:type="simple" xlink:show="embed" xlink:actuate="onLoad" draw:mime-type="image/png">
            <text:p/>
          </draw:image>
        </draw:frame>
        <draw:frame draw:style-name="gr1" draw:text-style-name="P2" draw:layer="layout" svg:width="0.422cm" svg:height="0.497cm" svg:x="2.541cm" svg:y="26.259cm">
          <draw:text-box>
            <text:p text:style-name="P1"><text:span text:style-name="T1"><text:s/></text:span></text:p>
          </draw:text-box>
        </draw:frame>
      </draw:page>
      <draw:page draw:name="page2" draw:style-name="dp1" draw:master-page-name="master-page3">
        <draw:frame draw:style-name="gr1" draw:text-style-name="P2" draw:layer="layout" svg:width="0.422cm" svg:height="0.497cm" svg:x="2.532cm" svg:y="1.275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97cm" svg:x="10.5cm" svg:y="1.275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97cm" svg:x="18.238cm" svg:y="1.275cm">
          <draw:text-box>
            <text:p text:style-name="P1"><text:span text:style-name="T1">2 </text:span></text:p>
          </draw:text-box>
        </draw:frame>
        <draw:frame draw:style-name="gr1" draw:text-style-name="P2" draw:layer="layout" svg:width="0.422cm" svg:height="0.497cm" svg:x="2.541cm" svg:y="1.804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97cm" svg:x="2.532cm" svg:y="27.396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97cm" svg:x="10.5cm" svg:y="27.396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97cm" svg:x="18.467cm" svg:y="27.396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97cm" svg:x="2.541cm" svg:y="27.926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3.73cm" svg:height="0.471cm" svg:x="2.541cm" svg:y="2.561cm">
          <draw:text-box>
            <text:p text:style-name="P1"><text:span text:style-name="T3">Tabla de contenidos </text:span></text:p>
          </draw:text-box>
        </draw:frame>
        <draw:frame draw:style-name="gr1" draw:text-style-name="P2" draw:layer="layout" svg:width="17.713cm" svg:height="0.497cm" svg:x="2.541cm" svg:y="3.392cm">
          <draw:text-box>
            <text:p text:style-name="P1"><text:span text:style-name="T1">1. Introducción ....................................................................................................... 2 </text:span></text:p>
          </draw:text-box>
        </draw:frame>
        <draw:frame draw:style-name="gr1" draw:text-style-name="P2" draw:layer="layout" svg:width="17.844cm" svg:height="0.497cm" svg:x="2.541cm" svg:y="4.169cm">
          <draw:text-box>
            <text:p text:style-name="P1"><text:span text:style-name="T1">2. Características principales................................................................................... 2 </text:span></text:p>
          </draw:text-box>
        </draw:frame>
        <draw:frame draw:style-name="gr1" draw:text-style-name="P2" draw:layer="layout" svg:width="18.225cm" svg:height="0.497cm" svg:x="2.541cm" svg:y="4.945cm">
          <draw:text-box>
            <text:p text:style-name="P1"><text:span text:style-name="T1">3. Tipos de bases de datos distribuidas ..................................................................... 3 </text:span></text:p>
          </draw:text-box>
        </draw:frame>
        <draw:frame draw:style-name="gr1" draw:text-style-name="P2" draw:layer="layout" svg:width="17.948cm" svg:height="0.497cm" svg:x="2.541cm" svg:y="5.73cm">
          <draw:text-box>
            <text:p text:style-name="P1"><text:span text:style-name="T1">4. Fragmentación de datos....................................................................................... 4 </text:span></text:p>
          </draw:text-box>
        </draw:frame>
        <draw:frame draw:style-name="gr1" draw:text-style-name="P2" draw:layer="layout" svg:width="17.859cm" svg:height="0.497cm" svg:x="2.541cm" svg:y="6.506cm">
          <draw:text-box>
            <text:p text:style-name="P1"><text:span text:style-name="T1">5. Replicación de datos ........................................................................................... 5 </text:span></text:p>
          </draw:text-box>
        </draw:frame>
        <draw:frame draw:style-name="gr1" draw:text-style-name="P2" draw:layer="layout" svg:width="17.989cm" svg:height="0.497cm" svg:x="2.541cm" svg:y="7.283cm">
          <draw:text-box>
            <text:p text:style-name="P1"><text:span text:style-name="T1">6. Consistencia y disponibilidad ............................................................................... 7 </text:span></text:p>
          </draw:text-box>
        </draw:frame>
        <draw:frame draw:style-name="gr1" draw:text-style-name="P2" draw:layer="layout" svg:width="18.497cm" svg:height="0.497cm" svg:x="2.541cm" svg:y="8.059cm">
          <draw:text-box>
            <text:p text:style-name="P1"><text:span text:style-name="T1">7. Ventajas y Desventajas de las bases de datos distribuidas ..................................... 7 </text:span></text:p>
          </draw:text-box>
        </draw:frame>
        <draw:frame draw:style-name="gr1" draw:text-style-name="P2" draw:layer="layout" svg:width="17.65cm" svg:height="0.497cm" svg:x="2.541cm" svg:y="8.835cm">
          <draw:text-box>
            <text:p text:style-name="P1"><text:span text:style-name="T1">Conclusión ............................................................................................................. 8 </text:span></text:p>
          </draw:text-box>
        </draw:frame>
        <draw:frame draw:style-name="gr1" draw:text-style-name="P2" draw:layer="layout" svg:width="0.422cm" svg:height="0.497cm" svg:x="2.541cm" svg:y="9.611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2.989cm" svg:height="0.471cm" svg:x="2.541cm" svg:y="10.862cm">
          <draw:text-box>
            <text:p text:style-name="P1"><text:span text:style-name="T3">1. Introducción <text:s/></text:span></text:p>
          </draw:text-box>
        </draw:frame>
        <draw:frame draw:style-name="gr1" draw:text-style-name="P2" draw:layer="layout" svg:width="14.674cm" svg:height="0.471cm" svg:x="3.794cm" svg:y="11.921cm">
          <draw:text-box>
            <text:p text:style-name="P1"><text:span text:style-name="T2">Las bases de datos distribuidas, ellas son de las tecnologías más cruciales hoy por hoy </text:span></text:p>
          </draw:text-box>
        </draw:frame>
        <draw:frame draw:style-name="gr1" draw:text-style-name="P2" draw:layer="layout" svg:width="16.272cm" svg:height="0.471cm" svg:x="2.541cm" svg:y="12.476cm">
          <draw:text-box>
            <text:p text:style-name="P1"><text:span text:style-name="T2">dentro de informática y sistemas de información contemporáneos. Organizaciones hoy por hoy, </text:span></text:p>
          </draw:text-box>
        </draw:frame>
        <draw:frame draw:style-name="gr1" draw:text-style-name="P2" draw:layer="layout" svg:width="15.953cm" svg:height="0.471cm" svg:x="2.541cm" svg:y="13.041cm">
          <draw:text-box>
            <text:p text:style-name="P1"><text:span text:style-name="T2">ellas crean y gestionan cantidades ingentes de data, esa data necesitaría disponibilidad rápida, </text:span></text:p>
          </draw:text-box>
        </draw:frame>
        <draw:frame draw:style-name="gr1" draw:text-style-name="P2" draw:layer="layout" svg:width="16.013cm" svg:height="0.471cm" svg:x="2.541cm" svg:y="13.597cm">
          <draw:text-box>
            <text:p text:style-name="P1"><text:span text:style-name="T2">segura y constante, para gente en distintas zonas del mundo. Por esa misma demanda, aparece </text:span></text:p>
          </draw:text-box>
        </draw:frame>
        <draw:frame draw:style-name="gr1" draw:text-style-name="P2" draw:layer="layout" svg:width="16.295cm" svg:height="0.471cm" svg:x="2.541cm" svg:y="14.161cm">
          <draw:text-box>
            <text:p text:style-name="P1"><text:span text:style-name="T2">la idea de base de datos distribuida, esta solución deja guardar información en varios servidores </text:span></text:p>
          </draw:text-box>
        </draw:frame>
        <draw:frame draw:style-name="gr1" draw:text-style-name="P2" draw:layer="layout" svg:width="14.099cm" svg:height="0.471cm" svg:x="2.541cm" svg:y="14.717cm">
          <draw:text-box>
            <text:p text:style-name="P1"><text:span text:style-name="T2">o sitios físicos, y se ve como una sola base de datos para los usuarios y programas. </text:span></text:p>
          </draw:text-box>
        </draw:frame>
        <draw:frame draw:style-name="gr1" draw:text-style-name="P2" draw:layer="layout" svg:width="14.931cm" svg:height="0.471cm" svg:x="3.794cm" svg:y="15.282cm">
          <draw:text-box>
            <text:p text:style-name="P1"><text:span text:style-name="T2">Distinto a las bases de datos centralizadas, en esas toda la data está guardada en un solo </text:span></text:p>
          </draw:text-box>
        </draw:frame>
        <draw:frame draw:style-name="gr1" draw:text-style-name="P2" draw:layer="layout" svg:width="15.392cm" svg:height="0.471cm" svg:x="2.541cm" svg:y="15.837cm">
          <draw:text-box>
            <text:p text:style-name="P1"><text:span text:style-name="T2">servidor, las bases de datos distribuidas permiten separar y poner <text:s/>los datos en otros nodos </text:span></text:p>
          </draw:text-box>
        </draw:frame>
        <draw:frame draw:style-name="gr1" draw:text-style-name="P2" draw:layer="layout" svg:width="16.447cm" svg:height="0.471cm" svg:x="2.541cm" svg:y="16.394cm">
          <draw:text-box>
            <text:p text:style-name="P1"><text:span text:style-name="T2">interconectados <text:s/>por <text:s/>una <text:s/>red. <text:s/>Cada <text:s/>nodo <text:s/>podría <text:s/>guardar <text:s/>una <text:s/>fracción <text:s/>de <text:s/>la <text:s/>data, <text:s/>o <text:s/>copias </text:span></text:p>
          </draw:text-box>
        </draw:frame>
        <draw:frame draw:style-name="gr1" draw:text-style-name="P2" draw:layer="layout" svg:width="16.236cm" svg:height="0.471cm" svg:x="2.541cm" svg:y="16.958cm">
          <draw:text-box>
            <text:p text:style-name="P1"><text:span text:style-name="T2">completas, <text:s/>dependiendo <text:s/>de <text:s/>los <text:s/>requerimientos <text:s/>de <text:s/>la <text:s/>empresa. <text:s/>Este <text:s/>tipo <text:s/>de <text:s/>diseño <text:s/>ofrece </text:span></text:p>
          </draw:text-box>
        </draw:frame>
        <draw:frame draw:style-name="gr1" draw:text-style-name="P2" draw:layer="layout" svg:width="15.823cm" svg:height="0.471cm" svg:x="2.541cm" svg:y="17.514cm">
          <draw:text-box>
            <text:p text:style-name="P1"><text:span text:style-name="T2">beneficios grandes en velocidad, accesibilidad, crecimiento y resistencia a fallos. El auge del </text:span></text:p>
          </draw:text-box>
        </draw:frame>
        <draw:frame draw:style-name="gr1" draw:text-style-name="P2" draw:layer="layout" svg:width="16.212cm" svg:height="0.471cm" svg:x="2.541cm" svg:y="18.078cm">
          <draw:text-box>
            <text:p text:style-name="P1"><text:span text:style-name="T2">internet, servicios nube, comercio electrónico y aplicaciones mundial ha sido la causa principal </text:span></text:p>
          </draw:text-box>
        </draw:frame>
        <draw:frame draw:style-name="gr1" draw:text-style-name="P2" draw:layer="layout" svg:width="1.66cm" svg:height="0.471cm" svg:x="2.541cm" svg:y="18.634cm">
          <draw:text-box>
            <text:p text:style-name="P1"><text:span text:style-name="T2">adopción </text:span></text:p>
          </draw:text-box>
        </draw:frame>
        <draw:frame draw:style-name="gr1" draw:text-style-name="P2" draw:layer="layout" svg:width="1.542cm" svg:height="0.471cm" svg:x="4.339cm" svg:y="18.634cm">
          <draw:text-box>
            <text:p text:style-name="P1"><text:span text:style-name="T2">sistemas </text:span></text:p>
          </draw:text-box>
        </draw:frame>
        <draw:frame draw:style-name="gr1" draw:text-style-name="P2" draw:layer="layout" svg:width="2.107cm" svg:height="0.471cm" svg:x="6.03cm" svg:y="18.634cm">
          <draw:text-box>
            <text:p text:style-name="P1"><text:span text:style-name="T2">distribuidos </text:span></text:p>
          </draw:text-box>
        </draw:frame>
        <draw:frame draw:style-name="gr1" draw:text-style-name="P2" draw:layer="layout" svg:width="0.507cm" svg:height="0.471cm" svg:x="8.278cm" svg:y="18.634cm">
          <draw:text-box>
            <text:p text:style-name="P1"><text:span text:style-name="T2">en </text:span></text:p>
          </draw:text-box>
        </draw:frame>
        <draw:frame draw:style-name="gr1" draw:text-style-name="P2" draw:layer="layout" svg:width="1.178cm" svg:height="0.471cm" svg:x="8.93cm" svg:y="18.634cm">
          <draw:text-box>
            <text:p text:style-name="P1"><text:span text:style-name="T2">globo. </text:span></text:p>
          </draw:text-box>
        </draw:frame>
        <draw:frame draw:style-name="gr1" draw:text-style-name="P2" draw:layer="layout" svg:width="1.707cm" svg:height="0.471cm" svg:x="10.253cm" svg:y="18.634cm">
          <draw:text-box>
            <text:p text:style-name="P1"><text:span text:style-name="T2">Negocios </text:span></text:p>
          </draw:text-box>
        </draw:frame>
        <draw:frame draw:style-name="gr1" draw:text-style-name="P2" draw:layer="layout" svg:width="0.884cm" svg:height="0.471cm" svg:x="12.112cm" svg:y="18.634cm">
          <draw:text-box>
            <text:p text:style-name="P1"><text:span text:style-name="T2">tales </text:span></text:p>
          </draw:text-box>
        </draw:frame>
        <draw:frame draw:style-name="gr1" draw:text-style-name="P2" draw:layer="layout" svg:width="1.048cm" svg:height="0.471cm" svg:x="13.134cm" svg:y="18.634cm">
          <draw:text-box>
            <text:p text:style-name="P1"><text:span text:style-name="T2">como </text:span></text:p>
          </draw:text-box>
        </draw:frame>
        <draw:frame draw:style-name="gr1" draw:text-style-name="P2" draw:layer="layout" svg:width="1.389cm" svg:height="0.471cm" svg:x="14.324cm" svg:y="18.634cm">
          <draw:text-box>
            <text:p text:style-name="P1"><text:span text:style-name="T2">bancos, </text:span></text:p>
          </draw:text-box>
        </draw:frame>
        <draw:frame draw:style-name="gr1" draw:text-style-name="P2" draw:layer="layout" svg:width="1.001cm" svg:height="0.471cm" svg:x="15.857cm" svg:y="18.634cm">
          <draw:text-box>
            <text:p text:style-name="P1"><text:span text:style-name="T2">redes </text:span></text:p>
          </draw:text-box>
        </draw:frame>
        <draw:frame draw:style-name="gr1" draw:text-style-name="P2" draw:layer="layout" svg:width="1.554cm" svg:height="0.471cm" svg:x="17.002cm" svg:y="18.634cm">
          <draw:text-box>
            <text:p text:style-name="P1"><text:span text:style-name="T2">sociales, </text:span></text:p>
          </draw:text-box>
        </draw:frame>
        <draw:frame draw:style-name="gr1" draw:text-style-name="P2" draw:layer="layout" svg:width="15.743cm" svg:height="0.471cm" svg:x="2.541cm" svg:y="19.199cm">
          <draw:text-box>
            <text:p text:style-name="P1"><text:span text:style-name="T2">plataformas streaming, sistemas reservas y tiendas online emplean bases datos distribuidas a </text:span></text:p>
          </draw:text-box>
        </draw:frame>
        <draw:frame draw:style-name="gr1" draw:text-style-name="P2" draw:layer="layout" svg:width="16.013cm" svg:height="0.471cm" svg:x="2.541cm" svg:y="19.755cm">
          <draw:text-box>
            <text:p text:style-name="P1"><text:span text:style-name="T2">fin <text:s/>que <text:s/>millones <text:s/>usuarios <text:s/>acceder <text:s/>datos <text:s/>eficientemente <text:s/>distintas <text:s/>localizaciones. <text:s/>Por <text:s/>esta </text:span></text:p>
          </draw:text-box>
        </draw:frame>
        <draw:frame draw:style-name="gr1" draw:text-style-name="P2" draw:layer="layout" svg:width="16.282cm" svg:height="0.471cm" svg:x="2.541cm" svg:y="20.319cm">
          <draw:text-box>
            <text:p text:style-name="P1"><text:span text:style-name="T2">manera, información puede más cerca usuarios finales, eso reduce tiempos respuesta y aumenta </text:span></text:p>
          </draw:text-box>
        </draw:frame>
        <draw:frame draw:style-name="gr1" draw:text-style-name="P2" draw:layer="layout" svg:width="2.858cm" svg:height="0.471cm" svg:x="2.541cm" svg:y="20.875cm">
          <draw:text-box>
            <text:p text:style-name="P1"><text:span text:style-name="T2">experiencia uso. </text:span></text:p>
          </draw:text-box>
        </draw:frame>
        <draw:frame draw:style-name="gr1" draw:text-style-name="P2" draw:layer="layout" svg:width="14.674cm" svg:height="0.471cm" svg:x="3.794cm" svg:y="21.439cm">
          <draw:text-box>
            <text:p text:style-name="P1"><text:span text:style-name="T2">Un <text:s/>factor <text:s/>crítico <text:s/>bases <text:s/>datos <text:s/>distribuidas <text:s/>es <text:s/>transparencia. <text:s/>Significa <text:s/>usuarios <text:s/>no </text:span></text:p>
          </draw:text-box>
        </draw:frame>
        <draw:frame draw:style-name="gr1" draw:text-style-name="P2" draw:layer="layout" svg:width="15.789cm" svg:height="0.471cm" svg:x="2.541cm" svg:y="21.995cm">
          <draw:text-box>
            <text:p text:style-name="P1"><text:span text:style-name="T2">precisan saber lugar preciso datos para preguntar o actualizar. El sistema manejo bases datos </text:span></text:p>
          </draw:text-box>
        </draw:frame>
        <draw:frame draw:style-name="gr1" draw:text-style-name="P2" draw:layer="layout" svg:width="16.083cm" svg:height="0.471cm" svg:x="2.541cm" svg:y="22.56cm">
          <draw:text-box>
            <text:p text:style-name="P1"><text:span text:style-name="T2">se ocupa encontrar info necesitada y ordenar operaciones entre servidores distintos, dando una </text:span></text:p>
          </draw:text-box>
        </draw:frame>
        <draw:frame draw:style-name="gr1" draw:text-style-name="P2" draw:layer="layout" svg:width="15.589cm" svg:height="0.471cm" svg:x="2.541cm" svg:y="23.116cm">
          <draw:text-box>
            <text:p text:style-name="P1"><text:span text:style-name="T2">experiencia semejante <text:s/>como si <text:s/>trabajas una base datos normal. Poniendo en práctica bases </text:span></text:p>
          </draw:text-box>
        </draw:frame>
        <draw:frame draw:style-name="gr1" draw:text-style-name="P2" draw:layer="layout" svg:width="16.025cm" svg:height="0.471cm" svg:x="2.541cm" svg:y="23.68cm">
          <draw:text-box>
            <text:p text:style-name="P1"><text:span text:style-name="T2">datos distribuidas trae también complicaciones notables. Sincronizar información, administrar </text:span></text:p>
          </draw:text-box>
        </draw:frame>
        <draw:frame draw:style-name="gr1" draw:text-style-name="P2" draw:layer="layout" svg:width="15.543cm" svg:height="0.471cm" svg:x="2.541cm" svg:y="24.236cm">
          <draw:text-box>
            <text:p text:style-name="P1"><text:span text:style-name="T2">transacciones distribuidas, asegurar los datos y lograr consistencia entre muchos servidores </text:span></text:p>
          </draw:text-box>
        </draw:frame>
        <draw:frame draw:style-name="gr1" draw:text-style-name="P2" draw:layer="layout" svg:width="15.684cm" svg:height="0.471cm" svg:x="2.541cm" svg:y="24.801cm">
          <draw:text-box>
            <text:p text:style-name="P1"><text:span text:style-name="T2">exige mecanismos propios para el óptimo funcionamiento. Además, la charla continua entre </text:span></text:p>
          </draw:text-box>
        </draw:frame>
        <draw:frame draw:style-name="gr1" draw:text-style-name="P2" draw:layer="layout" svg:width="10.912cm" svg:height="0.471cm" svg:x="2.541cm" svg:y="25.357cm">
          <draw:text-box>
            <text:p text:style-name="P1"><text:span text:style-name="T2">nodos varía un montón según la red, su estabilidad y su calidad. </text:span></text:p>
          </draw:text-box>
        </draw:frame>
        <draw:frame draw:style-name="gr1" draw:text-style-name="P2" draw:layer="layout" svg:width="14.638cm" svg:height="0.471cm" svg:x="3.794cm" svg:y="25.922cm">
          <draw:text-box>
            <text:p text:style-name="P1"><text:span text:style-name="T2">Dentro de este marco, las bases de datos distribuidas se estudian mucho para entender </text:span></text:p>
          </draw:text-box>
        </draw:frame>
        <draw:frame draw:style-name="gr1" draw:text-style-name="P2" draw:layer="layout" svg:width="15.625cm" svg:height="0.471cm" svg:x="2.541cm" svg:y="26.477cm">
          <draw:text-box>
            <text:p text:style-name="P1"><text:span text:style-name="T2">cómo las empresas actuales manejan ingentes cantidades de datos en lugares complicados y </text:span></text:p>
          </draw:text-box>
        </draw:frame>
      </draw:page>
      <draw:page draw:name="page3" draw:style-name="dp1" draw:master-page-name="master-page3">
        <draw:frame draw:style-name="gr1" draw:text-style-name="P2" draw:layer="layout" svg:width="0.422cm" svg:height="0.497cm" svg:x="2.532cm" svg:y="1.275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97cm" svg:x="10.5cm" svg:y="1.275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97cm" svg:x="18.238cm" svg:y="1.275cm">
          <draw:text-box>
            <text:p text:style-name="P1"><text:span text:style-name="T1">3 </text:span></text:p>
          </draw:text-box>
        </draw:frame>
        <draw:frame draw:style-name="gr1" draw:text-style-name="P2" draw:layer="layout" svg:width="0.422cm" svg:height="0.497cm" svg:x="2.541cm" svg:y="1.804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97cm" svg:x="2.532cm" svg:y="27.396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97cm" svg:x="10.5cm" svg:y="27.396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97cm" svg:x="18.467cm" svg:y="27.396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97cm" svg:x="2.541cm" svg:y="27.926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16.025cm" svg:height="0.471cm" svg:x="2.541cm" svg:y="2.561cm">
          <draw:text-box>
            <text:p text:style-name="P1"><text:span text:style-name="T2">muy separados. Ver sus particularidades, los modos de fragmentar, replicar, ser consistentes y </text:span></text:p>
          </draw:text-box>
        </draw:frame>
        <draw:frame draw:style-name="gr1" draw:text-style-name="P2" draw:layer="layout" svg:width="15.661cm" svg:height="0.471cm" svg:x="2.541cm" svg:y="3.116cm">
          <draw:text-box>
            <text:p text:style-name="P1"><text:span text:style-name="T2">estar disponibles te deja ver los puntos fuertes y débiles de esto, además de cómo influye en </text:span></text:p>
          </draw:text-box>
        </draw:frame>
        <draw:frame draw:style-name="gr1" draw:text-style-name="P2" draw:layer="layout" svg:width="8.114cm" svg:height="0.471cm" svg:x="2.541cm" svg:y="3.681cm">
          <draw:text-box>
            <text:p text:style-name="P1"><text:span text:style-name="T2">apps de negocios y servicios digitales enormes. </text:span></text:p>
          </draw:text-box>
        </draw:frame>
        <draw:frame draw:style-name="gr1" draw:text-style-name="P2" draw:layer="layout" svg:width="0.422cm" svg:height="0.497cm" svg:x="2.541cm" svg:y="4.715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5.363cm" svg:height="0.471cm" svg:x="2.541cm" svg:y="5.966cm">
          <draw:text-box>
            <text:p text:style-name="P1"><text:span text:style-name="T3">2. Características principales </text:span></text:p>
          </draw:text-box>
        </draw:frame>
        <draw:frame draw:style-name="gr1" draw:text-style-name="P2" draw:layer="layout" svg:width="14.768cm" svg:height="0.471cm" svg:x="3.794cm" svg:y="6.662cm">
          <draw:text-box>
            <text:p text:style-name="P1"><text:span text:style-name="T2">Las <text:s/>bases <text:s/>de <text:s/>datos <text:s/>distribuidas <text:s/>son <text:s/>una <text:s/>forma <text:s/>de <text:s/>manejar <text:s/>información, <text:s/>pero <text:s/>no </text:span></text:p>
          </draw:text-box>
        </draw:frame>
        <draw:frame draw:style-name="gr1" draw:text-style-name="P2" draw:layer="layout" svg:width="15.379cm" svg:height="0.471cm" svg:x="2.541cm" svg:y="7.228cm">
          <draw:text-box>
            <text:p text:style-name="P1"><text:span text:style-name="T2">guardándola toda en un solo lugar. En este tipo de base de datos, los datos pueden estar en </text:span></text:p>
          </draw:text-box>
        </draw:frame>
        <draw:frame draw:style-name="gr1" draw:text-style-name="P2" draw:layer="layout" svg:width="15.872cm" svg:height="0.471cm" svg:x="2.541cm" svg:y="7.784cm">
          <draw:text-box>
            <text:p text:style-name="P1"><text:span text:style-name="T2">diferentes computadoras, servidores o sedes, pero aun así se pueden consultar como si fueran </text:span></text:p>
          </draw:text-box>
        </draw:frame>
        <draw:frame draw:style-name="gr1" draw:text-style-name="P2" draw:layer="layout" svg:width="4.728cm" svg:height="0.471cm" svg:x="2.541cm" svg:y="8.348cm">
          <draw:text-box>
            <text:p text:style-name="P1"><text:span text:style-name="T2">parte de un mismo sistema. </text:span></text:p>
          </draw:text-box>
        </draw:frame>
        <draw:frame draw:style-name="gr1" draw:text-style-name="P2" draw:layer="layout" svg:width="14.871cm" svg:height="0.471cm" svg:x="3.794cm" svg:y="8.904cm">
          <draw:text-box>
            <text:p text:style-name="P1"><text:span text:style-name="T2">Una de las características principales es que la información está repartida. Por ejemplo, </text:span></text:p>
          </draw:text-box>
        </draw:frame>
        <draw:frame draw:style-name="gr1" draw:text-style-name="P2" draw:layer="layout" svg:width="16.2cm" svg:height="0.471cm" svg:x="2.541cm" svg:y="9.468cm">
          <draw:text-box>
            <text:p text:style-name="P1"><text:span text:style-name="T2">en el laboratorio se puede ver cuando una base de datos está en la computadora principal y otra </text:span></text:p>
          </draw:text-box>
        </draw:frame>
        <draw:frame draw:style-name="gr1" draw:text-style-name="P2" draw:layer="layout" svg:width="15.471cm" svg:height="0.471cm" svg:x="2.541cm" svg:y="10.024cm">
          <draw:text-box>
            <text:p text:style-name="P1"><text:span text:style-name="T2">está en la máquina virtual. Una puede representar la sede de Costa Rica y la otra la sede de </text:span></text:p>
          </draw:text-box>
        </draw:frame>
        <draw:frame draw:style-name="gr1" draw:text-style-name="P2" draw:layer="layout" svg:width="16.037cm" svg:height="0.471cm" svg:x="2.541cm" svg:y="10.589cm">
          <draw:text-box>
            <text:p text:style-name="P1"><text:span text:style-name="T2">México. Cada una guarda sus propios datos, pero después se pueden unir en una consulta para </text:span></text:p>
          </draw:text-box>
        </draw:frame>
        <draw:frame draw:style-name="gr1" draw:text-style-name="P2" draw:layer="layout" svg:width="4.998cm" svg:height="0.471cm" svg:x="2.541cm" svg:y="11.145cm">
          <draw:text-box>
            <text:p text:style-name="P1"><text:span text:style-name="T2">ver la información completa. </text:span></text:p>
          </draw:text-box>
        </draw:frame>
        <draw:frame draw:style-name="gr1" draw:text-style-name="P2" draw:layer="layout" svg:width="14.894cm" svg:height="0.471cm" svg:x="3.794cm" svg:y="11.709cm">
          <draw:text-box>
            <text:p text:style-name="P1"><text:span text:style-name="T2">Otra característica es la transparencia. Esto quiere decir que el usuario no siempre tiene </text:span></text:p>
          </draw:text-box>
        </draw:frame>
        <draw:frame draw:style-name="gr1" draw:text-style-name="P2" draw:layer="layout" svg:width="15.67cm" svg:height="0.471cm" svg:x="2.541cm" svg:y="12.265cm">
          <draw:text-box>
            <text:p text:style-name="P1"><text:span text:style-name="T2">que saber exactamente dónde está guardado cada dato. La persona solo hace la consulta y el </text:span></text:p>
          </draw:text-box>
        </draw:frame>
        <draw:frame draw:style-name="gr1" draw:text-style-name="P2" draw:layer="layout" svg:width="16.481cm" svg:height="0.471cm" svg:x="2.541cm" svg:y="12.829cm">
          <draw:text-box>
            <text:p text:style-name="P1"><text:span text:style-name="T2">sistema se encarga de buscar la información, ya sea que esté en la base local o en la base remota. </text:span></text:p>
          </draw:text-box>
        </draw:frame>
        <draw:frame draw:style-name="gr1" draw:text-style-name="P2" draw:layer="layout" svg:width="16.012cm" svg:height="0.471cm" svg:x="2.541cm" svg:y="13.385cm">
          <draw:text-box>
            <text:p text:style-name="P1"><text:span text:style-name="T2">Esto ayuda mucho porque no hay que estar entrando a cada servidor por separado para revisar </text:span></text:p>
          </draw:text-box>
        </draw:frame>
        <draw:frame draw:style-name="gr1" draw:text-style-name="P2" draw:layer="layout" svg:width="1.707cm" svg:height="0.471cm" svg:x="2.541cm" svg:y="13.941cm">
          <draw:text-box>
            <text:p text:style-name="P1"><text:span text:style-name="T2">los datos. </text:span></text:p>
          </draw:text-box>
        </draw:frame>
        <draw:frame draw:style-name="gr1" draw:text-style-name="P2" draw:layer="layout" svg:width="14.896cm" svg:height="0.471cm" svg:x="3.794cm" svg:y="14.505cm">
          <draw:text-box>
            <text:p text:style-name="P1"><text:span text:style-name="T2">También está la fragmentación, que es cuando los datos se dividen en partes. Esta parte </text:span></text:p>
          </draw:text-box>
        </draw:frame>
        <draw:frame draw:style-name="gr1" draw:text-style-name="P2" draw:layer="layout" svg:width="15.824cm" svg:height="0.471cm" svg:x="2.541cm" svg:y="15.061cm">
          <draw:text-box>
            <text:p text:style-name="P1"><text:span text:style-name="T2">es importante porque no siempre conviene tener toda la información junta. La fragmentación </text:span></text:p>
          </draw:text-box>
        </draw:frame>
        <draw:frame draw:style-name="gr1" draw:text-style-name="P2" draw:layer="layout" svg:width="15.672cm" svg:height="0.471cm" svg:x="2.541cm" svg:y="15.626cm">
          <draw:text-box>
            <text:p text:style-name="P1"><text:span text:style-name="T2">horizontal ocurre cuando se separan los registros, por ejemplo, los clientes de Costa Rica en </text:span></text:p>
          </draw:text-box>
        </draw:frame>
        <draw:frame draw:style-name="gr1" draw:text-style-name="P2" draw:layer="layout" svg:width="15.8cm" svg:height="0.471cm" svg:x="2.541cm" svg:y="16.182cm">
          <draw:text-box>
            <text:p text:style-name="P1"><text:span text:style-name="T2">una base y los clientes de México en otra. La fragmentación vertical se da cuando se separan </text:span></text:p>
          </draw:text-box>
        </draw:frame>
        <draw:frame draw:style-name="gr1" draw:text-style-name="P2" draw:layer="layout" svg:width="15.685cm" svg:height="0.471cm" svg:x="2.541cm" svg:y="16.747cm">
          <draw:text-box>
            <text:p text:style-name="P1"><text:span text:style-name="T2">las columnas, por ejemplo, en una base están los datos básicos del cliente y en otra están los </text:span></text:p>
          </draw:text-box>
        </draw:frame>
        <draw:frame draw:style-name="gr1" draw:text-style-name="P2" draw:layer="layout" svg:width="15.707cm" svg:height="0.471cm" svg:x="2.541cm" svg:y="17.302cm">
          <draw:text-box>
            <text:p text:style-name="P1"><text:span text:style-name="T2">datos de contacto. También existe la fragmentación mixta, que sería una combinación de las </text:span></text:p>
          </draw:text-box>
        </draw:frame>
        <draw:frame draw:style-name="gr1" draw:text-style-name="P2" draw:layer="layout" svg:width="0.802cm" svg:height="0.471cm" svg:x="2.541cm" svg:y="17.867cm">
          <draw:text-box>
            <text:p text:style-name="P1"><text:span text:style-name="T2">dos. </text:span></text:p>
          </draw:text-box>
        </draw:frame>
        <draw:frame draw:style-name="gr1" draw:text-style-name="P2" draw:layer="layout" svg:width="14.26cm" svg:height="0.471cm" svg:x="3.794cm" svg:y="18.422cm">
          <draw:text-box>
            <text:p text:style-name="P1"><text:span text:style-name="T2">Otra característica que se usa mucho es la replicación. Esto pasa cuando una misma </text:span></text:p>
          </draw:text-box>
        </draw:frame>
        <draw:frame draw:style-name="gr1" draw:text-style-name="P2" draw:layer="layout" svg:width="16.166cm" svg:height="0.471cm" svg:x="2.541cm" svg:y="18.987cm">
          <draw:text-box>
            <text:p text:style-name="P1"><text:span text:style-name="T2">información existe en más de una base de datos. Por ejemplo, la tabla de productos puede estar </text:span></text:p>
          </draw:text-box>
        </draw:frame>
        <draw:frame draw:style-name="gr1" draw:text-style-name="P2" draw:layer="layout" svg:width="15.743cm" svg:height="0.471cm" svg:x="2.541cm" svg:y="19.543cm">
          <draw:text-box>
            <text:p text:style-name="P1"><text:span text:style-name="T2">tanto en la computadora principal como en la máquina virtual. Esto puede ser útil porque las </text:span></text:p>
          </draw:text-box>
        </draw:frame>
        <draw:frame draw:style-name="gr1" draw:text-style-name="P2" draw:layer="layout" svg:width="14.532cm" svg:height="0.471cm" svg:x="2.541cm" svg:y="20.108cm">
          <draw:text-box>
            <text:p text:style-name="P1"><text:span text:style-name="T2">dos sedes pueden consultar los productos sin depender completamente una de la otra. </text:span></text:p>
          </draw:text-box>
        </draw:frame>
        <draw:frame draw:style-name="gr1" draw:text-style-name="P2" draw:layer="layout" svg:width="14.683cm" svg:height="0.471cm" svg:x="3.794cm" svg:y="20.664cm">
          <draw:text-box>
            <text:p text:style-name="P1"><text:span text:style-name="T2">El detalle con la replicación es que también puede traer problemas de consistencia. La </text:span></text:p>
          </draw:text-box>
        </draw:frame>
        <draw:frame draw:style-name="gr1" draw:text-style-name="P2" draw:layer="layout" svg:width="15.802cm" svg:height="0.471cm" svg:x="2.541cm" svg:y="21.228cm">
          <draw:text-box>
            <text:p text:style-name="P1"><text:span text:style-name="T2">consistencia significa que los datos deberían estar iguales y actualizados en todos los lugares </text:span></text:p>
          </draw:text-box>
        </draw:frame>
        <draw:frame draw:style-name="gr1" draw:text-style-name="P2" draw:layer="layout" svg:width="15.542cm" svg:height="0.471cm" svg:x="2.541cm" svg:y="21.784cm">
          <draw:text-box>
            <text:p text:style-name="P1"><text:span text:style-name="T2">donde se guardan. Por ejemplo, si el precio de una laptop se cambia en una base, pero en la </text:span></text:p>
          </draw:text-box>
        </draw:frame>
        <draw:frame draw:style-name="gr1" draw:text-style-name="P2" draw:layer="layout" svg:width="15.201cm" svg:height="0.471cm" svg:x="2.541cm" svg:y="22.349cm">
          <draw:text-box>
            <text:p text:style-name="P1"><text:span text:style-name="T2">otra queda con el precio anterior, ya hay un problema porque la información no coincide. </text:span></text:p>
          </draw:text-box>
        </draw:frame>
        <draw:frame draw:style-name="gr1" draw:text-style-name="P2" draw:layer="layout" svg:width="15.049cm" svg:height="0.471cm" svg:x="3.794cm" svg:y="22.904cm">
          <draw:text-box>
            <text:p text:style-name="P1"><text:span text:style-name="T2">También <text:s/>se <text:s/>puede <text:s/>hablar <text:s/>de <text:s/>autonomía <text:s/>local. <text:s/>Esto <text:s/>significa <text:s/>que <text:s/>cada <text:s/>sede <text:s/>puede </text:span></text:p>
          </draw:text-box>
        </draw:frame>
        <draw:frame draw:style-name="gr1" draw:text-style-name="P2" draw:layer="layout" svg:width="15.65cm" svg:height="0.471cm" svg:x="2.541cm" svg:y="23.469cm">
          <draw:text-box>
            <text:p text:style-name="P1"><text:span text:style-name="T2">trabajar con sus propios datos. Por ejemplo, Costa Rica puede registrar sus ventas y México </text:span></text:p>
          </draw:text-box>
        </draw:frame>
        <draw:frame draw:style-name="gr1" draw:text-style-name="P2" draw:layer="layout" svg:width="15.978cm" svg:height="0.471cm" svg:x="2.541cm" svg:y="24.024cm">
          <draw:text-box>
            <text:p text:style-name="P1"><text:span text:style-name="T2">puede <text:s/>registrar <text:s/>las <text:s/>suyas. <text:s/>No <text:s/>todo <text:s/>depende <text:s/>de <text:s/>una <text:s/>sola <text:s/>base <text:s/>central, <text:s/>y <text:s/>eso <text:s/>le <text:s/>da <text:s/>más </text:span></text:p>
          </draw:text-box>
        </draw:frame>
        <draw:frame draw:style-name="gr1" draw:text-style-name="P2" draw:layer="layout" svg:width="6.784cm" svg:height="0.471cm" svg:x="2.541cm" svg:y="24.58cm">
          <draw:text-box>
            <text:p text:style-name="P1"><text:span text:style-name="T2">independencia a cada parte del sistema. </text:span></text:p>
          </draw:text-box>
        </draw:frame>
        <draw:frame draw:style-name="gr1" draw:text-style-name="P2" draw:layer="layout" svg:width="0.422cm" svg:height="0.471cm" svg:x="3.794cm" svg:y="25.145cm">
          <draw:text-box>
            <text:p text:style-name="P1"><text:span text:style-name="T2"><text:s text:c="2"/></text:span></text:p>
          </draw:text-box>
        </draw:frame>
        <draw:frame draw:style-name="gr1" draw:text-style-name="P2" draw:layer="layout" svg:width="14.804cm" svg:height="0.471cm" svg:x="3.794cm" svg:y="25.701cm">
          <draw:text-box>
            <text:p text:style-name="P1"><text:span text:style-name="T2">Por <text:s/>último, <text:s/>una <text:s/>base <text:s/>de <text:s/>datos <text:s/>distribuida <text:s/>depende <text:s/>bastante <text:s/>de <text:s/>la <text:s/>red. <text:s/>Como <text:s/>los </text:span></text:p>
          </draw:text-box>
        </draw:frame>
        <draw:frame draw:style-name="gr1" draw:text-style-name="P2" draw:layer="layout" svg:width="16.177cm" svg:height="0.471cm" svg:x="2.541cm" svg:y="26.274cm">
          <draw:text-box>
            <text:p text:style-name="P1"><text:span text:style-name="T2">servidores <text:s/>o <text:s/>computadoras <text:s/>tienen <text:s/>que <text:s/>comunicarse <text:s/>entre <text:s/>sí, <text:s/>la <text:s/>conexión <text:s/>debe <text:s/>estar <text:s/>bien </text:span></text:p>
          </draw:text-box>
        </draw:frame>
      </draw:page>
      <draw:page draw:name="page4" draw:style-name="dp1" draw:master-page-name="master-page3">
        <draw:frame draw:style-name="gr1" draw:text-style-name="P2" draw:layer="layout" svg:width="0.422cm" svg:height="0.497cm" svg:x="2.532cm" svg:y="1.275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97cm" svg:x="10.5cm" svg:y="1.275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97cm" svg:x="18.238cm" svg:y="1.275cm">
          <draw:text-box>
            <text:p text:style-name="P1"><text:span text:style-name="T1">4 </text:span></text:p>
          </draw:text-box>
        </draw:frame>
        <draw:frame draw:style-name="gr1" draw:text-style-name="P2" draw:layer="layout" svg:width="0.422cm" svg:height="0.497cm" svg:x="2.541cm" svg:y="1.804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97cm" svg:x="2.532cm" svg:y="27.396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97cm" svg:x="10.5cm" svg:y="27.396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97cm" svg:x="18.467cm" svg:y="27.396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97cm" svg:x="2.541cm" svg:y="27.926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15.742cm" svg:height="0.471cm" svg:x="2.541cm" svg:y="2.561cm">
          <draw:text-box>
            <text:p text:style-name="P1"><text:span text:style-name="T2">configurada. Si la red falla, las consultas que ocupan información de otra base pueden tardar </text:span></text:p>
          </draw:text-box>
        </draw:frame>
        <draw:frame draw:style-name="gr1" draw:text-style-name="P2" draw:layer="layout" svg:width="5.739cm" svg:height="0.471cm" svg:x="2.541cm" svg:y="3.125cm">
          <draw:text-box>
            <text:p text:style-name="P1"><text:span text:style-name="T2">más o simplemente no funcionar. </text:span></text:p>
          </draw:text-box>
        </draw:frame>
        <draw:frame draw:style-name="gr1" draw:text-style-name="P2" draw:layer="layout" svg:width="14.907cm" svg:height="0.471cm" svg:x="3.794cm" svg:y="3.972cm">
          <draw:text-box>
            <text:p text:style-name="P1"><text:span text:style-name="T2">En <text:s/>pocas <text:s/>palabras, <text:s/>una <text:s/>base <text:s/>de <text:s/>datos <text:s/>distribuida <text:s/>se <text:s/>caracteriza <text:s/>porque <text:s/>reparte <text:s/>la </text:span></text:p>
          </draw:text-box>
        </draw:frame>
        <draw:frame draw:style-name="gr1" draw:text-style-name="P2" draw:layer="layout" svg:width="15.613cm" svg:height="0.471cm" svg:x="2.541cm" svg:y="4.537cm">
          <draw:text-box>
            <text:p text:style-name="P1"><text:span text:style-name="T2">información en varios lugares, pero permite trabajar con esos datos de forma conjunta. Para </text:span></text:p>
          </draw:text-box>
        </draw:frame>
        <draw:frame draw:style-name="gr1" draw:text-style-name="P2" draw:layer="layout" svg:width="15.6cm" svg:height="0.471cm" svg:x="2.541cm" svg:y="5.11cm">
          <draw:text-box>
            <text:p text:style-name="P1"><text:span text:style-name="T2">eso usa cosas como fragmentación, replicación, transparencia, consistencia y comunicación </text:span></text:p>
          </draw:text-box>
        </draw:frame>
        <draw:frame draw:style-name="gr1" draw:text-style-name="P2" draw:layer="layout" svg:width="2.905cm" svg:height="0.471cm" svg:x="2.541cm" svg:y="5.675cm">
          <draw:text-box>
            <text:p text:style-name="P1"><text:span text:style-name="T2">entre servidores. </text:span></text:p>
          </draw:text-box>
        </draw:frame>
        <draw:frame draw:style-name="gr1" draw:text-style-name="P2" draw:layer="layout" svg:width="7.012cm" svg:height="0.471cm" svg:x="2.541cm" svg:y="6.874cm">
          <draw:text-box>
            <text:p text:style-name="P1"><text:span text:style-name="T3">3. Tipos de bases de datos distribuidas </text:span></text:p>
          </draw:text-box>
        </draw:frame>
        <draw:frame draw:style-name="gr1" draw:text-style-name="P2" draw:layer="layout" svg:width="14.18cm" svg:height="0.471cm" svg:x="3.812cm" svg:y="7.572cm">
          <draw:text-box>
            <text:p text:style-name="P1"><text:span text:style-name="T2">En el ámbito de los sistemas distribuidos, las bases de datos se pueden clasificar de </text:span></text:p>
          </draw:text-box>
        </draw:frame>
        <draw:frame draw:style-name="gr1" draw:text-style-name="P2" draw:layer="layout" svg:width="15.955cm" svg:height="0.471cm" svg:x="2.541cm" svg:y="8.136cm">
          <draw:text-box>
            <text:p text:style-name="P1"><text:span text:style-name="T2">diversas maneras, pero una de las más importantes es según el grado de uniformidad entre los </text:span></text:p>
          </draw:text-box>
        </draw:frame>
        <draw:frame draw:style-name="gr1" draw:text-style-name="P2" draw:layer="layout" svg:width="16.06cm" svg:height="0.471cm" svg:x="2.541cm" svg:y="8.692cm">
          <draw:text-box>
            <text:p text:style-name="P1"><text:span text:style-name="T2">nodos que las componen. Esta clasificación da lugar a dos categorías principales: homogéneas </text:span></text:p>
          </draw:text-box>
        </draw:frame>
        <draw:frame draw:style-name="gr1" draw:text-style-name="P2" draw:layer="layout" svg:width="2.741cm" svg:height="0.471cm" svg:x="2.541cm" svg:y="9.256cm">
          <draw:text-box>
            <text:p text:style-name="P1"><text:span text:style-name="T2">y heterogéneas. </text:span></text:p>
          </draw:text-box>
        </draw:frame>
        <draw:frame draw:style-name="gr1" draw:text-style-name="P2" draw:layer="layout" svg:width="0.422cm" svg:height="0.471cm" svg:x="3.812cm" svg:y="9.812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14.804cm" svg:height="0.471cm" svg:x="3.812cm" svg:y="10.377cm">
          <draw:text-box>
            <text:p text:style-name="P1"><text:span text:style-name="T2">Bases de datos distribuidas homogéneas: En este tipo de arquitectura, todos los sitios o </text:span></text:p>
          </draw:text-box>
        </draw:frame>
        <draw:frame draw:style-name="gr1" draw:text-style-name="P2" draw:layer="layout" svg:width="16.166cm" svg:height="0.471cm" svg:x="2.541cm" svg:y="10.933cm">
          <draw:text-box>
            <text:p text:style-name="P1"><text:span text:style-name="T2">nodos que forman parte del sistema utilizan exactamente el mismo Sistema Gestor de Bases de </text:span></text:p>
          </draw:text-box>
        </draw:frame>
        <draw:frame draw:style-name="gr1" draw:text-style-name="P2" draw:layer="layout" svg:width="16.496cm" svg:height="0.471cm" svg:x="2.541cm" svg:y="11.497cm">
          <draw:text-box>
            <text:p text:style-name="P1"><text:span text:style-name="T2">Datos <text:s/>(SGBD). <text:s/>Esto <text:s/>significa <text:s/>que, <text:s/>si <text:s/>una <text:s/>empresa <text:s/>decide <text:s/>implementar <text:s/>una <text:s/>base <text:s/>de <text:s/>datos </text:span></text:p>
          </draw:text-box>
        </draw:frame>
        <draw:frame draw:style-name="gr1" draw:text-style-name="P2" draw:layer="layout" svg:width="15.873cm" svg:height="0.471cm" svg:x="2.541cm" svg:y="12.053cm">
          <draw:text-box>
            <text:p text:style-name="P1"><text:span text:style-name="T2">distribuida homogénea, todos sus servidores ya sea en diferentes oficinas, países o centros de </text:span></text:p>
          </draw:text-box>
        </draw:frame>
        <draw:frame draw:style-name="gr1" draw:text-style-name="P2" draw:layer="layout" svg:width="16.486cm" svg:height="0.471cm" svg:x="2.541cm" svg:y="12.617cm">
          <draw:text-box>
            <text:p text:style-name="P1"><text:span text:style-name="T2">datos <text:s/>ejecutarán <text:s/>el <text:s/>mismo <text:s/>software, <text:s/>como <text:s/>MySQL, <text:s/>PostgreSQL, <text:s/>Microsoft <text:s/>SQL <text:s/>Server <text:s/>u </text:span></text:p>
          </draw:text-box>
        </draw:frame>
        <draw:frame draw:style-name="gr1" draw:text-style-name="P2" draw:layer="layout" svg:width="15.742cm" svg:height="0.471cm" svg:x="2.541cm" svg:y="13.174cm">
          <draw:text-box>
            <text:p text:style-name="P1"><text:span text:style-name="T2">Oracle. La gran ventaja de este enfoque es la simplicidad operativa: al ser todos los sistemas </text:span></text:p>
          </draw:text-box>
        </draw:frame>
        <draw:frame draw:style-name="gr1" draw:text-style-name="P2" draw:layer="layout" svg:width="16.437cm" svg:height="0.471cm" svg:x="2.541cm" svg:y="13.738cm">
          <draw:text-box>
            <text:p text:style-name="P1"><text:span text:style-name="T2">idénticos, <text:s/>la <text:s/>administración, <text:s/>las <text:s/>actualizaciones, <text:s/>las <text:s/>políticas <text:s/>de <text:s/>seguridad <text:s/>y <text:s/>el <text:s/>control <text:s/>de </text:span></text:p>
          </draw:text-box>
        </draw:frame>
        <draw:frame draw:style-name="gr1" draw:text-style-name="P2" draw:layer="layout" svg:width="16.283cm" svg:height="0.471cm" svg:x="2.541cm" svg:y="14.294cm">
          <draw:text-box>
            <text:p text:style-name="P1"><text:span text:style-name="T2">acceso <text:s/>son <text:s/>uniformes. <text:s/>Los <text:s/>desarrolladores <text:s/>también <text:s/>se <text:s/>benefician, <text:s/>ya <text:s/>que <text:s/>pueden <text:s/>escribir </text:span></text:p>
          </draw:text-box>
        </draw:frame>
        <draw:frame draw:style-name="gr1" draw:text-style-name="P2" draw:layer="layout" svg:width="1.683cm" svg:height="0.471cm" svg:x="2.541cm" svg:y="14.858cm">
          <draw:text-box>
            <text:p text:style-name="P1"><text:span text:style-name="T2">consultas </text:span></text:p>
          </draw:text-box>
        </draw:frame>
        <draw:frame draw:style-name="gr1" draw:text-style-name="P2" draw:layer="layout" svg:width="0.719cm" svg:height="0.471cm" svg:x="4.401cm" svg:y="14.858cm">
          <draw:text-box>
            <text:p text:style-name="P1"><text:span text:style-name="T2">que </text:span></text:p>
          </draw:text-box>
        </draw:frame>
        <draw:frame draw:style-name="gr1" draw:text-style-name="P2" draw:layer="layout" svg:width="2.129cm" svg:height="0.471cm" svg:x="5.3cm" svg:y="14.858cm">
          <draw:text-box>
            <text:p text:style-name="P1"><text:span text:style-name="T2">funcionarán </text:span></text:p>
          </draw:text-box>
        </draw:frame>
        <draw:frame draw:style-name="gr1" draw:text-style-name="P2" draw:layer="layout" svg:width="0.602cm" svg:height="0.471cm" svg:x="7.61cm" svg:y="14.858cm">
          <draw:text-box>
            <text:p text:style-name="P1"><text:span text:style-name="T2">sin </text:span></text:p>
          </draw:text-box>
        </draw:frame>
        <draw:frame draw:style-name="gr1" draw:text-style-name="P2" draw:layer="layout" svg:width="2.694cm" svg:height="0.471cm" svg:x="8.394cm" svg:y="14.858cm">
          <draw:text-box>
            <text:p text:style-name="P1"><text:span text:style-name="T2">modificaciones </text:span></text:p>
          </draw:text-box>
        </draw:frame>
        <draw:frame draw:style-name="gr1" draw:text-style-name="P2" draw:layer="layout" svg:width="0.507cm" svg:height="0.471cm" svg:x="11.267cm" svg:y="14.858cm">
          <draw:text-box>
            <text:p text:style-name="P1"><text:span text:style-name="T2">en </text:span></text:p>
          </draw:text-box>
        </draw:frame>
        <draw:frame draw:style-name="gr1" draw:text-style-name="P2" draw:layer="layout" svg:width="1.683cm" svg:height="0.471cm" svg:x="11.973cm" svg:y="14.858cm">
          <draw:text-box>
            <text:p text:style-name="P1"><text:span text:style-name="T2">cualquier </text:span></text:p>
          </draw:text-box>
        </draw:frame>
        <draw:frame draw:style-name="gr1" draw:text-style-name="P2" draw:layer="layout" svg:width="1.06cm" svg:height="0.471cm" svg:x="13.824cm" svg:y="14.858cm">
          <draw:text-box>
            <text:p text:style-name="P1"><text:span text:style-name="T2">nodo. </text:span></text:p>
          </draw:text-box>
        </draw:frame>
        <draw:frame draw:style-name="gr1" draw:text-style-name="P2" draw:layer="layout" svg:width="0.673cm" svg:height="0.471cm" svg:x="15.068cm" svg:y="14.858cm">
          <draw:text-box>
            <text:p text:style-name="P1"><text:span text:style-name="T2">Sin </text:span></text:p>
          </draw:text-box>
        </draw:frame>
        <draw:frame draw:style-name="gr1" draw:text-style-name="P2" draw:layer="layout" svg:width="1.695cm" svg:height="0.471cm" svg:x="15.923cm" svg:y="14.858cm">
          <draw:text-box>
            <text:p text:style-name="P1"><text:span text:style-name="T2">embargo, </text:span></text:p>
          </draw:text-box>
        </draw:frame>
        <draw:frame draw:style-name="gr1" draw:text-style-name="P2" draw:layer="layout" svg:width="0.766cm" svg:height="0.471cm" svg:x="17.8cm" svg:y="14.858cm">
          <draw:text-box>
            <text:p text:style-name="P1"><text:span text:style-name="T2">esta </text:span></text:p>
          </draw:text-box>
        </draw:frame>
        <draw:frame draw:style-name="gr1" draw:text-style-name="P2" draw:layer="layout" svg:width="16.26cm" svg:height="0.471cm" svg:x="2.541cm" svg:y="15.414cm">
          <draw:text-box>
            <text:p text:style-name="P1"><text:span text:style-name="T2">uniformidad tiene un costo: la falta de flexibilidad para integrar sistemas ya existentes que sean </text:span></text:p>
          </draw:text-box>
        </draw:frame>
        <draw:frame draw:style-name="gr1" draw:text-style-name="P2" draw:layer="layout" svg:width="1.883cm" svg:height="0.471cm" svg:x="2.541cm" svg:y="15.978cm">
          <draw:text-box>
            <text:p text:style-name="P1"><text:span text:style-name="T2">diferentes. </text:span></text:p>
          </draw:text-box>
        </draw:frame>
        <draw:frame draw:style-name="gr1" draw:text-style-name="P2" draw:layer="layout" svg:width="0.422cm" svg:height="0.471cm" svg:x="3.812cm" svg:y="16.535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14.956cm" svg:height="0.471cm" svg:x="3.812cm" svg:y="17.099cm">
          <draw:text-box>
            <text:p text:style-name="P1"><text:span text:style-name="T2">Bases de datos distribuidas heterogéneas: En contraste, este tipo de sistema permite que </text:span></text:p>
          </draw:text-box>
        </draw:frame>
        <draw:frame draw:style-name="gr1" draw:text-style-name="P2" draw:layer="layout" svg:width="16.156cm" svg:height="0.471cm" svg:x="2.541cm" svg:y="17.655cm">
          <draw:text-box>
            <text:p text:style-name="P1"><text:span text:style-name="T2">los <text:s/>diferentes <text:s/>sitios <text:s/>utilicen <text:s/>distintos <text:s/>SGBD, <text:s/>ya <text:s/>sean <text:s/>de <text:s/>diferentes <text:s/>fabricantes <text:s/>o <text:s/>incluso </text:span></text:p>
          </draw:text-box>
        </draw:frame>
        <draw:frame draw:style-name="gr1" draw:text-style-name="P2" draw:layer="layout" svg:width="15.427cm" svg:height="0.471cm" svg:x="2.541cm" svg:y="18.211cm">
          <draw:text-box>
            <text:p text:style-name="P1"><text:span text:style-name="T2">versiones distintas de un mismo motor. Por ejemplo, una sede principal podría usar Oracle </text:span></text:p>
          </draw:text-box>
        </draw:frame>
        <draw:frame draw:style-name="gr1" draw:text-style-name="P2" draw:layer="layout" svg:width="15.896cm" svg:height="0.471cm" svg:x="2.541cm" svg:y="18.775cm">
          <draw:text-box>
            <text:p text:style-name="P1"><text:span text:style-name="T2">Database, una regional podría emplear MySQL, una oficina más pequeña PostgreSQL, y otra </text:span></text:p>
          </draw:text-box>
        </draw:frame>
        <draw:frame draw:style-name="gr1" draw:text-style-name="P2" draw:layer="layout" svg:width="16.272cm" svg:height="0.471cm" svg:x="2.541cm" svg:y="19.331cm">
          <draw:text-box>
            <text:p text:style-name="P1"><text:span text:style-name="T2">incluso <text:s/>SQL <text:s/>Server. <text:s/>La <text:s/>principal <text:s/>ventaja <text:s/>es <text:s/>la <text:s/>flexibilidad: <text:s/>permite <text:s/>a <text:s/>las <text:s/>organizaciones </text:span></text:p>
          </draw:text-box>
        </draw:frame>
        <draw:frame draw:style-name="gr1" draw:text-style-name="P2" draw:layer="layout" svg:width="15.919cm" svg:height="0.471cm" svg:x="2.541cm" svg:y="19.896cm">
          <draw:text-box>
            <text:p text:style-name="P1"><text:span text:style-name="T2">aprovechar la infraestructura ya existente sin necesidad de unificar todos los sistemas bajo un </text:span></text:p>
          </draw:text-box>
        </draw:frame>
        <draw:frame draw:style-name="gr1" draw:text-style-name="P2" draw:layer="layout" svg:width="16.025cm" svg:height="0.471cm" svg:x="2.541cm" svg:y="20.452cm">
          <draw:text-box>
            <text:p text:style-name="P1"><text:span text:style-name="T2">mismo estándar, lo cual es común en fusiones de empresas o en entornos con larga trayectoria </text:span></text:p>
          </draw:text-box>
        </draw:frame>
        <draw:frame draw:style-name="gr1" draw:text-style-name="P2" draw:layer="layout" svg:width="16.272cm" svg:height="0.471cm" svg:x="2.541cm" svg:y="21.016cm">
          <draw:text-box>
            <text:p text:style-name="P1"><text:span text:style-name="T2">tecnológica. <text:s/>No <text:s/>obstante, <text:s/>esta <text:s/>heterogeneidad <text:s/>introduce <text:s/>una <text:s/>complejidad <text:s/>significativa. <text:s/>Es </text:span></text:p>
          </draw:text-box>
        </draw:frame>
        <draw:frame draw:style-name="gr1" draw:text-style-name="P2" draw:layer="layout" svg:width="16.177cm" svg:height="0.471cm" svg:x="2.541cm" svg:y="21.572cm">
          <draw:text-box>
            <text:p text:style-name="P1"><text:span text:style-name="T2">necesario implementar mecanismos de traducción de consultas (como middleware o puertas de </text:span></text:p>
          </draw:text-box>
        </draw:frame>
        <draw:frame draw:style-name="gr1" draw:text-style-name="P2" draw:layer="layout" svg:width="16.283cm" svg:height="0.471cm" svg:x="2.541cm" svg:y="22.136cm">
          <draw:text-box>
            <text:p text:style-name="P1"><text:span text:style-name="T2">enlace), gestionar diferencias en los tipos de datos, en el manejo de transacciones, en la sintaxis </text:span></text:p>
          </draw:text-box>
        </draw:frame>
        <draw:frame draw:style-name="gr1" draw:text-style-name="P2" draw:layer="layout" svg:width="16.284cm" svg:height="0.471cm" svg:x="2.541cm" svg:y="22.693cm">
          <draw:text-box>
            <text:p text:style-name="P1"><text:span text:style-name="T2">SQL y en los niveles de aislamiento. Además, la integración y la migración de datos se vuelven </text:span></text:p>
          </draw:text-box>
        </draw:frame>
        <draw:frame draw:style-name="gr1" draw:text-style-name="P2" draw:layer="layout" svg:width="15.706cm" svg:height="0.471cm" svg:x="2.541cm" svg:y="23.257cm">
          <draw:text-box>
            <text:p text:style-name="P1"><text:span text:style-name="T2">tareas no triviales. Otra clasificación relevante atiende al grado de replicación y distribución </text:span></text:p>
          </draw:text-box>
        </draw:frame>
        <draw:frame draw:style-name="gr1" draw:text-style-name="P2" draw:layer="layout" svg:width="2.224cm" svg:height="0.471cm" svg:x="2.541cm" svg:y="23.813cm">
          <draw:text-box>
            <text:p text:style-name="P1"><text:span text:style-name="T2">de los datos: </text:span></text:p>
          </draw:text-box>
        </draw:frame>
        <draw:frame draw:style-name="gr1" draw:text-style-name="P2" draw:layer="layout" svg:width="0.422cm" svg:height="0.471cm" svg:x="3.812cm" svg:y="24.377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15.131cm" svg:height="0.471cm" svg:x="3.812cm" svg:y="24.933cm">
          <draw:text-box>
            <text:p text:style-name="P1"><text:span text:style-name="T2">Distribuidas <text:s/>no <text:s/>replicadas <text:s/>(fragmentadas): <text:s/>La <text:s/>información <text:s/>se <text:s/>divide <text:s/>en <text:s/>fragmentos </text:span></text:p>
          </draw:text-box>
        </draw:frame>
        <draw:frame draw:style-name="gr1" draw:text-style-name="P2" draw:layer="layout" svg:width="15.451cm" svg:height="0.471cm" svg:x="2.541cm" svg:y="25.498cm">
          <draw:text-box>
            <text:p text:style-name="P1"><text:span text:style-name="T2">únicos distribuidos entre los servidores. Cada fragmento reside en un solo nodo, sin copias </text:span></text:p>
          </draw:text-box>
        </draw:frame>
        <draw:frame draw:style-name="gr1" draw:text-style-name="P2" draw:layer="layout" svg:width="11.262cm" svg:height="0.471cm" svg:x="2.541cm" svg:y="26.054cm">
          <draw:text-box>
            <text:p text:style-name="P1"><text:span text:style-name="T2">adicionales. Esto ahorra espacio pero reduce la tolerancia a fallos. </text:span></text:p>
          </draw:text-box>
        </draw:frame>
        <draw:frame draw:style-name="gr1" draw:text-style-name="P2" draw:layer="layout" svg:width="0.422cm" svg:height="0.471cm" svg:x="3.812cm" svg:y="26.618cm">
          <draw:text-box>
            <text:p text:style-name="P1"><text:span text:style-name="T2"><text:s/></text:span></text:p>
          </draw:text-box>
        </draw:frame>
      </draw:page>
      <draw:page draw:name="page5" draw:style-name="dp1" draw:master-page-name="master-page3">
        <draw:frame draw:style-name="gr1" draw:text-style-name="P2" draw:layer="layout" svg:width="0.422cm" svg:height="0.497cm" svg:x="2.532cm" svg:y="1.275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97cm" svg:x="10.5cm" svg:y="1.275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97cm" svg:x="18.238cm" svg:y="1.275cm">
          <draw:text-box>
            <text:p text:style-name="P1"><text:span text:style-name="T1">5 </text:span></text:p>
          </draw:text-box>
        </draw:frame>
        <draw:frame draw:style-name="gr1" draw:text-style-name="P2" draw:layer="layout" svg:width="0.422cm" svg:height="0.497cm" svg:x="2.541cm" svg:y="1.804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97cm" svg:x="2.532cm" svg:y="27.396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97cm" svg:x="10.5cm" svg:y="27.396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97cm" svg:x="18.467cm" svg:y="27.396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97cm" svg:x="2.541cm" svg:y="27.926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14.508cm" svg:height="0.471cm" svg:x="3.812cm" svg:y="2.561cm">
          <draw:text-box>
            <text:p text:style-name="P1"><text:span text:style-name="T2">Distribuidas replicadas totalmente: Cada sitio contiene una copia completa de toda la </text:span></text:p>
          </draw:text-box>
        </draw:frame>
        <draw:frame draw:style-name="gr1" draw:text-style-name="P2" draw:layer="layout" svg:width="16.049cm" svg:height="0.471cm" svg:x="2.541cm" svg:y="3.116cm">
          <draw:text-box>
            <text:p text:style-name="P1"><text:span text:style-name="T2">base <text:s/>de <text:s/>datos. <text:s/>Ofrece <text:s/>alta <text:s/>disponibilidad <text:s/>y <text:s/>rendimiento <text:s/>en <text:s/>lecturas, <text:s/>pero <text:s/>es <text:s/>costoso <text:s/>en </text:span></text:p>
          </draw:text-box>
        </draw:frame>
        <draw:frame draw:style-name="gr1" draw:text-style-name="P2" draw:layer="layout" svg:width="14.905cm" svg:height="0.471cm" svg:x="2.541cm" svg:y="3.681cm">
          <draw:text-box>
            <text:p text:style-name="P1"><text:span text:style-name="T2">almacenamiento y complejo en actualizaciones (requiere sincronización entre réplicas). </text:span></text:p>
          </draw:text-box>
        </draw:frame>
        <draw:frame draw:style-name="gr1" draw:text-style-name="P2" draw:layer="layout" svg:width="0.422cm" svg:height="0.471cm" svg:x="3.812cm" svg:y="4.237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14.308cm" svg:height="0.471cm" svg:x="3.812cm" svg:y="4.802cm">
          <draw:text-box>
            <text:p text:style-name="P1"><text:span text:style-name="T2">Distribuidas con replicación parcial: Solo algunas partes de la base de datos (ciertos </text:span></text:p>
          </draw:text-box>
        </draw:frame>
        <draw:frame draw:style-name="gr1" draw:text-style-name="P2" draw:layer="layout" svg:width="15.814cm" svg:height="0.471cm" svg:x="2.541cm" svg:y="5.357cm">
          <draw:text-box>
            <text:p text:style-name="P1"><text:span text:style-name="T2">fragmentos) se replican en más de un sitio. Es un equilibrio entre disponibilidad y eficiencia. </text:span></text:p>
          </draw:text-box>
        </draw:frame>
        <draw:frame draw:style-name="gr1" draw:text-style-name="P2" draw:layer="layout" svg:width="4.882cm" svg:height="0.471cm" svg:x="2.541cm" svg:y="6.557cm">
          <draw:text-box>
            <text:p text:style-name="P1"><text:span text:style-name="T3">4. Fragmentación de datos </text:span></text:p>
          </draw:text-box>
        </draw:frame>
        <draw:frame draw:style-name="gr1" draw:text-style-name="P2" draw:layer="layout" svg:width="0.554cm" svg:height="0.471cm" svg:x="3.812cm" svg:y="7.263cm">
          <draw:text-box>
            <text:p text:style-name="P1"><text:span text:style-name="T2">La </text:span></text:p>
          </draw:text-box>
        </draw:frame>
        <draw:frame draw:style-name="gr1" draw:text-style-name="P2" draw:layer="layout" svg:width="2.553cm" svg:height="0.471cm" svg:x="4.508cm" svg:y="7.263cm">
          <draw:text-box>
            <text:p text:style-name="P1"><text:span text:style-name="T2">fragmentación </text:span></text:p>
          </draw:text-box>
        </draw:frame>
        <draw:frame draw:style-name="gr1" draw:text-style-name="P2" draw:layer="layout" svg:width="0.46cm" svg:height="0.471cm" svg:x="7.205cm" svg:y="7.263cm">
          <draw:text-box>
            <text:p text:style-name="P1"><text:span text:style-name="T2">es </text:span></text:p>
          </draw:text-box>
        </draw:frame>
        <draw:frame draw:style-name="gr1" draw:text-style-name="P2" draw:layer="layout" svg:width="0.719cm" svg:height="0.471cm" svg:x="7.812cm" svg:y="7.263cm">
          <draw:text-box>
            <text:p text:style-name="P1"><text:span text:style-name="T2">una </text:span></text:p>
          </draw:text-box>
        </draw:frame>
        <draw:frame draw:style-name="gr1" draw:text-style-name="P2" draw:layer="layout" svg:width="1.306cm" svg:height="0.471cm" svg:x="8.676cm" svg:y="7.263cm">
          <draw:text-box>
            <text:p text:style-name="P1"><text:span text:style-name="T2">técnica </text:span></text:p>
          </draw:text-box>
        </draw:frame>
        <draw:frame draw:style-name="gr1" draw:text-style-name="P2" draw:layer="layout" svg:width="2.224cm" svg:height="0.471cm" svg:x="10.129cm" svg:y="7.263cm">
          <draw:text-box>
            <text:p text:style-name="P1"><text:span text:style-name="T2">fundamental </text:span></text:p>
          </draw:text-box>
        </draw:frame>
        <draw:frame draw:style-name="gr1" draw:text-style-name="P2" draw:layer="layout" svg:width="0.507cm" svg:height="0.471cm" svg:x="12.5cm" svg:y="7.263cm">
          <draw:text-box>
            <text:p text:style-name="P1"><text:span text:style-name="T2">en </text:span></text:p>
          </draw:text-box>
        </draw:frame>
        <draw:frame draw:style-name="gr1" draw:text-style-name="P2" draw:layer="layout" svg:width="0.422cm" svg:height="0.471cm" svg:x="13.161cm" svg:y="7.263cm">
          <draw:text-box>
            <text:p text:style-name="P1"><text:span text:style-name="T2">el </text:span></text:p>
          </draw:text-box>
        </draw:frame>
        <draw:frame draw:style-name="gr1" draw:text-style-name="P2" draw:layer="layout" svg:width="1.213cm" svg:height="0.471cm" svg:x="13.716cm" svg:y="7.263cm">
          <draw:text-box>
            <text:p text:style-name="P1"><text:span text:style-name="T2">diseño </text:span></text:p>
          </draw:text-box>
        </draw:frame>
        <draw:frame draw:style-name="gr1" draw:text-style-name="P2" draw:layer="layout" svg:width="0.507cm" svg:height="0.471cm" svg:x="15.073cm" svg:y="7.263cm">
          <draw:text-box>
            <text:p text:style-name="P1"><text:span text:style-name="T2">de </text:span></text:p>
          </draw:text-box>
        </draw:frame>
        <draw:frame draw:style-name="gr1" draw:text-style-name="P2" draw:layer="layout" svg:width="1.025cm" svg:height="0.471cm" svg:x="15.725cm" svg:y="7.263cm">
          <draw:text-box>
            <text:p text:style-name="P1"><text:span text:style-name="T2">bases </text:span></text:p>
          </draw:text-box>
        </draw:frame>
        <draw:frame draw:style-name="gr1" draw:text-style-name="P2" draw:layer="layout" svg:width="0.507cm" svg:height="0.471cm" svg:x="16.896cm" svg:y="7.263cm">
          <draw:text-box>
            <text:p text:style-name="P1"><text:span text:style-name="T2">de </text:span></text:p>
          </draw:text-box>
        </draw:frame>
        <draw:frame draw:style-name="gr1" draw:text-style-name="P2" draw:layer="layout" svg:width="1.001cm" svg:height="0.471cm" svg:x="17.548cm" svg:y="7.263cm">
          <draw:text-box>
            <text:p text:style-name="P1"><text:span text:style-name="T2">datos </text:span></text:p>
          </draw:text-box>
        </draw:frame>
        <draw:frame draw:style-name="gr1" draw:text-style-name="P2" draw:layer="layout" svg:width="16.227cm" svg:height="0.471cm" svg:x="2.541cm" svg:y="7.819cm">
          <draw:text-box>
            <text:p text:style-name="P1"><text:span text:style-name="T2">distribuidas. <text:s/>Consiste <text:s/>en <text:s/>dividir <text:s/>lógicamente <text:s/>una <text:s/>base <text:s/>de <text:s/>datos <text:s/>global <text:s/>en <text:s/>porciones <text:s/>más </text:span></text:p>
          </draw:text-box>
        </draw:frame>
        <draw:frame draw:style-name="gr1" draw:text-style-name="P2" draw:layer="layout" svg:width="15.743cm" svg:height="0.471cm" svg:x="2.541cm" svg:y="8.383cm">
          <draw:text-box>
            <text:p text:style-name="P1"><text:span text:style-name="T2">pequeñas, llamadas fragmentos, y luego asignar cada fragmento a uno o más sitios de la red. </text:span></text:p>
          </draw:text-box>
        </draw:frame>
        <draw:frame draw:style-name="gr1" draw:text-style-name="P2" draw:layer="layout" svg:width="16.213cm" svg:height="0.471cm" svg:x="2.541cm" svg:y="8.939cm">
          <draw:text-box>
            <text:p text:style-name="P1"><text:span text:style-name="T2">El objetivo principal es acercar los datos a los usuarios que más los utilizan, reducir la latencia, </text:span></text:p>
          </draw:text-box>
        </draw:frame>
        <draw:frame draw:style-name="gr1" draw:text-style-name="P2" draw:layer="layout" svg:width="15.99cm" svg:height="0.471cm" svg:x="2.541cm" svg:y="9.503cm">
          <draw:text-box>
            <text:p text:style-name="P1"><text:span text:style-name="T2">mejorar el rendimiento de las consultas y aumentar la disponibilidad. Una fragmentación bien </text:span></text:p>
          </draw:text-box>
        </draw:frame>
        <draw:frame draw:style-name="gr1" draw:text-style-name="P2" draw:layer="layout" svg:width="16.059cm" svg:height="0.471cm" svg:x="2.541cm" svg:y="10.059cm">
          <draw:text-box>
            <text:p text:style-name="P1"><text:span text:style-name="T2">diseñada <text:s/>permite <text:s/>que <text:s/>cada <text:s/>servidor <text:s/>procese <text:s/>únicamente <text:s/>la <text:s/>información <text:s/>que <text:s/>le <text:s/>compete, </text:span></text:p>
          </draw:text-box>
        </draw:frame>
        <draw:frame draw:style-name="gr1" draw:text-style-name="P2" draw:layer="layout" svg:width="15.554cm" svg:height="0.471cm" svg:x="2.541cm" svg:y="10.624cm">
          <draw:text-box>
            <text:p text:style-name="P1"><text:span text:style-name="T2">evitando cuellos de botella y transferencias masivas de datos a través de la red. Existen tres </text:span></text:p>
          </draw:text-box>
        </draw:frame>
        <draw:frame draw:style-name="gr1" draw:text-style-name="P2" draw:layer="layout" svg:width="5.962cm" svg:height="0.471cm" svg:x="2.541cm" svg:y="11.18cm">
          <draw:text-box>
            <text:p text:style-name="P1"><text:span text:style-name="T2">tipos principales de fragmentación:</text:span></text:p>
          </draw:text-box>
        </draw:frame>
        <draw:frame draw:style-name="gr1" draw:text-style-name="P2" draw:layer="layout" svg:width="0.422cm" svg:height="0.497cm" svg:x="8.505cm" svg:y="11.164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71cm" svg:x="3.812cm" svg:y="11.744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14.709cm" svg:height="0.471cm" svg:x="3.812cm" svg:y="12.3cm">
          <draw:text-box>
            <text:p text:style-name="P1"><text:span text:style-name="T2">Fragmentación horizontal: Este método divide la tabla original por filas (tuplas). Cada </text:span></text:p>
          </draw:text-box>
        </draw:frame>
        <draw:frame draw:style-name="gr1" draw:text-style-name="P2" draw:layer="layout" svg:width="15.472cm" svg:height="0.471cm" svg:x="2.541cm" svg:y="12.864cm">
          <draw:text-box>
            <text:p text:style-name="P1"><text:span text:style-name="T2">fragmento contiene un subconjunto de las filas de la tabla original, pero mantiene todas las </text:span></text:p>
          </draw:text-box>
        </draw:frame>
        <draw:frame draw:style-name="gr1" draw:text-style-name="P2" draw:layer="layout" svg:width="15.824cm" svg:height="0.471cm" svg:x="2.541cm" svg:y="13.421cm">
          <draw:text-box>
            <text:p text:style-name="P1"><text:span text:style-name="T2">columnas. Por ejemplo, en una tabla global de clientes, se puede fragmentar horizontalmente </text:span></text:p>
          </draw:text-box>
        </draw:frame>
        <draw:frame draw:style-name="gr1" draw:text-style-name="P2" draw:layer="layout" svg:width="15.778cm" svg:height="0.471cm" svg:x="2.541cm" svg:y="13.985cm">
          <draw:text-box>
            <text:p text:style-name="P1"><text:span text:style-name="T2">por criterios geográficos: el fragmento A podría contener todos los clientes de Costa Rica, el </text:span></text:p>
          </draw:text-box>
        </draw:frame>
        <draw:frame draw:style-name="gr1" draw:text-style-name="P2" draw:layer="layout" svg:width="16.179cm" svg:height="0.471cm" svg:x="2.541cm" svg:y="14.541cm">
          <draw:text-box>
            <text:p text:style-name="P1"><text:span text:style-name="T2">fragmento B los de México, y el fragmento C los de España. Otro criterio común es por rangos </text:span></text:p>
          </draw:text-box>
        </draw:frame>
        <draw:frame draw:style-name="gr1" draw:text-style-name="P2" draw:layer="layout" svg:width="16.073cm" svg:height="0.471cm" svg:x="2.541cm" svg:y="15.105cm">
          <draw:text-box>
            <text:p text:style-name="P1"><text:span text:style-name="T2">numéricos (por ejemplo, clientes con ID del 1 al 10,000 en un servidor, y del 10,001 al 20,000 </text:span></text:p>
          </draw:text-box>
        </draw:frame>
        <draw:frame draw:style-name="gr1" draw:text-style-name="P2" draw:layer="layout" svg:width="15.893cm" svg:height="0.471cm" svg:x="2.541cm" svg:y="15.661cm">
          <draw:text-box>
            <text:p text:style-name="P1"><text:span text:style-name="T2">en otro). La ventaja es que permite paralelizar consultas que afectan a varias filas pero que se </text:span></text:p>
          </draw:text-box>
        </draw:frame>
        <draw:frame draw:style-name="gr1" draw:text-style-name="P2" draw:layer="layout" svg:width="9.757cm" svg:height="0.471cm" svg:x="2.541cm" svg:y="16.226cm">
          <draw:text-box>
            <text:p text:style-name="P1"><text:span text:style-name="T2">pueden filtrar fácilmente por el criterio de fragmentación.</text:span></text:p>
          </draw:text-box>
        </draw:frame>
        <draw:frame draw:style-name="gr1" draw:text-style-name="P2" draw:layer="layout" svg:width="0.422cm" svg:height="0.497cm" svg:x="12.3cm" svg:y="16.211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71cm" svg:x="3.812cm" svg:y="16.782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14.403cm" svg:height="0.471cm" svg:x="3.812cm" svg:y="17.346cm">
          <draw:text-box>
            <text:p text:style-name="P1"><text:span text:style-name="T2">Fragmentación vertical: En lugar de dividir por filas, se divide la tabla por columnas </text:span></text:p>
          </draw:text-box>
        </draw:frame>
        <draw:frame draw:style-name="gr1" draw:text-style-name="P2" draw:layer="layout" svg:width="16.084cm" svg:height="0.471cm" svg:x="2.541cm" svg:y="17.902cm">
          <draw:text-box>
            <text:p text:style-name="P1"><text:span text:style-name="T2">(atributos). Cada fragmento contiene un subconjunto de las columnas de la tabla original, pero </text:span></text:p>
          </draw:text-box>
        </draw:frame>
        <draw:frame draw:style-name="gr1" draw:text-style-name="P2" draw:layer="layout" svg:width="16.211cm" svg:height="0.471cm" svg:x="2.541cm" svg:y="18.466cm">
          <draw:text-box>
            <text:p text:style-name="P1"><text:span text:style-name="T2">generalmente <text:s/>se <text:s/>incluye <text:s/>una <text:s/>clave <text:s/>primaria <text:s/>en <text:s/>cada <text:s/>fragmento <text:s/>para <text:s/>poder <text:s/>reconstruir <text:s/>la </text:span></text:p>
          </draw:text-box>
        </draw:frame>
        <draw:frame draw:style-name="gr1" draw:text-style-name="P2" draw:layer="layout" svg:width="15.578cm" svg:height="0.471cm" svg:x="2.541cm" svg:y="19.022cm">
          <draw:text-box>
            <text:p text:style-name="P1"><text:span text:style-name="T2">información original si es necesario. Por ejemplo, en una tabla de empleados, un fragmento </text:span></text:p>
          </draw:text-box>
        </draw:frame>
        <draw:frame draw:style-name="gr1" draw:text-style-name="P2" draw:layer="layout" svg:width="15.507cm" svg:height="0.471cm" svg:x="2.541cm" svg:y="19.578cm">
          <draw:text-box>
            <text:p text:style-name="P1"><text:span text:style-name="T2">podría contener datos personales sensibles (nombre, dirección, fecha de nacimiento) <text:s/>en un </text:span></text:p>
          </draw:text-box>
        </draw:frame>
        <draw:frame draw:style-name="gr1" draw:text-style-name="P2" draw:layer="layout" svg:width="16.531cm" svg:height="0.471cm" svg:x="2.541cm" svg:y="20.143cm">
          <draw:text-box>
            <text:p text:style-name="P1"><text:span text:style-name="T2">servidor <text:s/>con <text:s/>altos <text:s/>controles <text:s/>de <text:s/>seguridad, <text:s/>mientras <text:s/>que <text:s/>otro <text:s/>fragmento <text:s/>guardaría <text:s/>datos <text:s/>de </text:span></text:p>
          </draw:text-box>
        </draw:frame>
        <draw:frame draw:style-name="gr1" draw:text-style-name="P2" draw:layer="layout" svg:width="15.424cm" svg:height="0.471cm" svg:x="2.541cm" svg:y="20.698cm">
          <draw:text-box>
            <text:p text:style-name="P1"><text:span text:style-name="T2">facturación y salario (código de empleado, salario, número de cuenta) en otro servidor con </text:span></text:p>
          </draw:text-box>
        </draw:frame>
        <draw:frame draw:style-name="gr1" draw:text-style-name="P2" draw:layer="layout" svg:width="15.954cm" svg:height="0.471cm" svg:x="2.541cm" svg:y="21.263cm">
          <draw:text-box>
            <text:p text:style-name="P1"><text:span text:style-name="T2">políticas de acceso distintas. La fragmentación vertical es útil cuando distintos departamentos </text:span></text:p>
          </draw:text-box>
        </draw:frame>
        <draw:frame draw:style-name="gr1" draw:text-style-name="P2" draw:layer="layout" svg:width="13.391cm" svg:height="0.471cm" svg:x="2.541cm" svg:y="21.819cm">
          <draw:text-box>
            <text:p text:style-name="P1"><text:span text:style-name="T2">necesitan acceder a diferentes subconjuntos de atributos de una misma entidad.</text:span></text:p>
          </draw:text-box>
        </draw:frame>
        <draw:frame draw:style-name="gr1" draw:text-style-name="P2" draw:layer="layout" svg:width="0.422cm" svg:height="0.497cm" svg:x="15.935cm" svg:y="21.803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71cm" svg:x="3.812cm" svg:y="22.384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14.498cm" svg:height="0.471cm" svg:x="3.812cm" svg:y="22.94cm">
          <draw:text-box>
            <text:p text:style-name="P1"><text:span text:style-name="T2">Fragmentación mixta (o híbrida): Como su nombre indica, combina los dos enfoques </text:span></text:p>
          </draw:text-box>
        </draw:frame>
        <draw:frame draw:style-name="gr1" draw:text-style-name="P2" draw:layer="layout" svg:width="15.695cm" svg:height="0.471cm" svg:x="2.541cm" svg:y="23.504cm">
          <draw:text-box>
            <text:p text:style-name="P1"><text:span text:style-name="T2">anteriores. Primero se aplica una fragmentación vertical (por columnas) y luego sobre uno o </text:span></text:p>
          </draw:text-box>
        </draw:frame>
        <draw:frame draw:style-name="gr1" draw:text-style-name="P2" draw:layer="layout" svg:width="16.235cm" svg:height="0.471cm" svg:x="2.541cm" svg:y="24.06cm">
          <draw:text-box>
            <text:p text:style-name="P1"><text:span text:style-name="T2">más fragmentos resultantes se aplica una fragmentación horizontal (por filas), o viceversa. Este </text:span></text:p>
          </draw:text-box>
        </draw:frame>
        <draw:frame draw:style-name="gr1" draw:text-style-name="P2" draw:layer="layout" svg:width="15.461cm" svg:height="0.471cm" svg:x="2.541cm" svg:y="24.624cm">
          <draw:text-box>
            <text:p text:style-name="P1"><text:span text:style-name="T2">tipo es <text:s/>el más flexible y potente, porque permite adaptar <text:s/>la distribución de <text:s/>los datos a las </text:span></text:p>
          </draw:text-box>
        </draw:frame>
        <draw:frame draw:style-name="gr1" draw:text-style-name="P2" draw:layer="layout" svg:width="16.354cm" svg:height="0.471cm" svg:x="2.541cm" svg:y="25.18cm">
          <draw:text-box>
            <text:p text:style-name="P1"><text:span text:style-name="T2">necesidades <text:s/>más <text:s/>complejas <text:s/>de <text:s/>una <text:s/>organización. <text:s/>Por <text:s/>ejemplo, <text:s/>una <text:s/>empresa <text:s/>multinacional </text:span></text:p>
          </draw:text-box>
        </draw:frame>
        <draw:frame draw:style-name="gr1" draw:text-style-name="P2" draw:layer="layout" svg:width="15.477cm" svg:height="0.471cm" svg:x="2.541cm" svg:y="25.745cm">
          <draw:text-box>
            <text:p text:style-name="P1"><text:span text:style-name="T2">podría primero separar los datos de clientes en dos grupos verticales: "datos de contacto" y </text:span></text:p>
          </draw:text-box>
        </draw:frame>
        <draw:frame draw:style-name="gr1" draw:text-style-name="P2" draw:layer="layout" svg:width="1.174cm" svg:height="0.471cm" svg:x="2.541cm" svg:y="26.301cm">
          <draw:text-box>
            <text:p text:style-name="P1"><text:span text:style-name="T2">"datos </text:span></text:p>
          </draw:text-box>
        </draw:frame>
        <draw:frame draw:style-name="gr1" draw:text-style-name="P2" draw:layer="layout" svg:width="2.267cm" svg:height="0.471cm" svg:x="3.88cm" svg:y="26.301cm">
          <draw:text-box>
            <text:p text:style-name="P1"><text:span text:style-name="T2">financieros". </text:span></text:p>
          </draw:text-box>
        </draw:frame>
        <draw:frame draw:style-name="gr1" draw:text-style-name="P2" draw:layer="layout" svg:width="1.295cm" svg:height="0.471cm" svg:x="6.304cm" svg:y="26.301cm">
          <draw:text-box>
            <text:p text:style-name="P1"><text:span text:style-name="T2">Luego, </text:span></text:p>
          </draw:text-box>
        </draw:frame>
        <draw:frame draw:style-name="gr1" draw:text-style-name="P2" draw:layer="layout" svg:width="0.422cm" svg:height="0.471cm" svg:x="7.758cm" svg:y="26.301cm">
          <draw:text-box>
            <text:p text:style-name="P1"><text:span text:style-name="T2">el </text:span></text:p>
          </draw:text-box>
        </draw:frame>
        <draw:frame draw:style-name="gr1" draw:text-style-name="P2" draw:layer="layout" svg:width="1.847cm" svg:height="0.471cm" svg:x="8.331cm" svg:y="26.301cm">
          <draw:text-box>
            <text:p text:style-name="P1"><text:span text:style-name="T2">fragmento </text:span></text:p>
          </draw:text-box>
        </draw:frame>
        <draw:frame draw:style-name="gr1" draw:text-style-name="P2" draw:layer="layout" svg:width="0.507cm" svg:height="0.471cm" svg:x="10.341cm" svg:y="26.301cm">
          <draw:text-box>
            <text:p text:style-name="P1"><text:span text:style-name="T2">de </text:span></text:p>
          </draw:text-box>
        </draw:frame>
        <draw:frame draw:style-name="gr1" draw:text-style-name="P2" draw:layer="layout" svg:width="1.174cm" svg:height="0.471cm" svg:x="11.011cm" svg:y="26.301cm">
          <draw:text-box>
            <text:p text:style-name="P1"><text:span text:style-name="T2">"datos </text:span></text:p>
          </draw:text-box>
        </draw:frame>
        <draw:frame draw:style-name="gr1" draw:text-style-name="P2" draw:layer="layout" svg:width="0.507cm" svg:height="0.471cm" svg:x="12.35cm" svg:y="26.301cm">
          <draw:text-box>
            <text:p text:style-name="P1"><text:span text:style-name="T2">de </text:span></text:p>
          </draw:text-box>
        </draw:frame>
        <draw:frame draw:style-name="gr1" draw:text-style-name="P2" draw:layer="layout" svg:width="1.715cm" svg:height="0.471cm" svg:x="13.02cm" svg:y="26.301cm">
          <draw:text-box>
            <text:p text:style-name="P1"><text:span text:style-name="T2">contacto" </text:span></text:p>
          </draw:text-box>
        </draw:frame>
        <draw:frame draw:style-name="gr1" draw:text-style-name="P2" draw:layer="layout" svg:width="1.189cm" svg:height="0.471cm" svg:x="14.889cm" svg:y="26.301cm">
          <draw:text-box>
            <text:p text:style-name="P1"><text:span text:style-name="T2">podría </text:span></text:p>
          </draw:text-box>
        </draw:frame>
        <draw:frame draw:style-name="gr1" draw:text-style-name="P2" draw:layer="layout" svg:width="2.317cm" svg:height="0.471cm" svg:x="16.237cm" svg:y="26.301cm">
          <draw:text-box>
            <text:p text:style-name="P1"><text:span text:style-name="T2">fragmentarse </text:span></text:p>
          </draw:text-box>
        </draw:frame>
      </draw:page>
      <draw:page draw:name="page6" draw:style-name="dp1" draw:master-page-name="master-page3">
        <draw:frame draw:style-name="gr1" draw:text-style-name="P2" draw:layer="layout" svg:width="0.422cm" svg:height="0.497cm" svg:x="2.532cm" svg:y="1.275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97cm" svg:x="10.5cm" svg:y="1.275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97cm" svg:x="18.238cm" svg:y="1.275cm">
          <draw:text-box>
            <text:p text:style-name="P1"><text:span text:style-name="T1">6 </text:span></text:p>
          </draw:text-box>
        </draw:frame>
        <draw:frame draw:style-name="gr1" draw:text-style-name="P2" draw:layer="layout" svg:width="0.422cm" svg:height="0.497cm" svg:x="2.541cm" svg:y="1.804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97cm" svg:x="2.532cm" svg:y="27.396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97cm" svg:x="10.5cm" svg:y="27.396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97cm" svg:x="18.467cm" svg:y="27.396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97cm" svg:x="2.541cm" svg:y="27.926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15.496cm" svg:height="0.471cm" svg:x="2.541cm" svg:y="2.561cm">
          <draw:text-box>
            <text:p text:style-name="P1"><text:span text:style-name="T2">horizontalmente por país, de modo que cada oficina regional solo tenga los contactos de su </text:span></text:p>
          </draw:text-box>
        </draw:frame>
        <draw:frame draw:style-name="gr1" draw:text-style-name="P2" draw:layer="layout" svg:width="15.742cm" svg:height="0.471cm" svg:x="2.541cm" svg:y="3.116cm">
          <draw:text-box>
            <text:p text:style-name="P1"><text:span text:style-name="T2">zona, mientras que los datos financieros se mantengan centralizados en la sede principal con </text:span></text:p>
          </draw:text-box>
        </draw:frame>
        <draw:frame draw:style-name="gr1" draw:text-style-name="P2" draw:layer="layout" svg:width="15.964cm" svg:height="0.471cm" svg:x="2.541cm" svg:y="3.681cm">
          <draw:text-box>
            <text:p text:style-name="P1"><text:span text:style-name="T2">acceso restringido. La fragmentación mixta exige una planificación cuidadosa, pero ofrece un </text:span></text:p>
          </draw:text-box>
        </draw:frame>
        <draw:frame draw:style-name="gr1" draw:text-style-name="P2" draw:layer="layout" svg:width="14.355cm" svg:height="0.471cm" svg:x="2.541cm" svg:y="4.237cm">
          <draw:text-box>
            <text:p text:style-name="P1"><text:span text:style-name="T2">control granular sobre la ubicación, el rendimiento y la seguridad de la información. </text:span></text:p>
          </draw:text-box>
        </draw:frame>
        <draw:frame draw:style-name="gr1" draw:text-style-name="P2" draw:layer="layout" svg:width="0.422cm" svg:height="0.497cm" svg:x="2.541cm" svg:y="4.786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4.247cm" svg:height="0.471cm" svg:x="2.541cm" svg:y="6.036cm">
          <draw:text-box>
            <text:p text:style-name="P1"><text:span text:style-name="T3">5. Replicación de datos </text:span></text:p>
          </draw:text-box>
        </draw:frame>
        <draw:frame draw:style-name="gr1" draw:text-style-name="P2" draw:layer="layout" svg:width="14.425cm" svg:height="0.471cm" svg:x="3.794cm" svg:y="7.096cm">
          <draw:text-box>
            <text:p text:style-name="P1"><text:span text:style-name="T2">La replicación de datos se considera una técnica sumamente vital en el ámbito de las </text:span></text:p>
          </draw:text-box>
        </draw:frame>
        <draw:frame draw:style-name="gr1" draw:text-style-name="P2" draw:layer="layout" svg:width="16.531cm" svg:height="0.471cm" svg:x="2.541cm" svg:y="7.66cm">
          <draw:text-box>
            <text:p text:style-name="P1"><text:span text:style-name="T2">bases <text:s/>de <text:s/>datos <text:s/>distribuidas. <text:s/>Esto <text:s/>implica, <text:s/>en <text:s/>esencia, <text:s/>salvaguardar <text:s/>múltiples <text:s/>instancias <text:s/>del </text:span></text:p>
          </draw:text-box>
        </draw:frame>
        <draw:frame draw:style-name="gr1" draw:text-style-name="P2" draw:layer="layout" svg:width="15.345cm" svg:height="0.471cm" svg:x="2.541cm" svg:y="8.216cm">
          <draw:text-box>
            <text:p text:style-name="P1"><text:span text:style-name="T2">mismo conjunto de datos en servidores o nodos de red distintos, con el fin de <text:s/>potenciar la </text:span></text:p>
          </draw:text-box>
        </draw:frame>
        <draw:frame draw:style-name="gr1" draw:text-style-name="P2" draw:layer="layout" svg:width="16.037cm" svg:height="0.471cm" svg:x="2.541cm" svg:y="8.78cm">
          <draw:text-box>
            <text:p text:style-name="P1"><text:span text:style-name="T2">disponibilidad, la robustez y la eficiencia del sistema. Gracias a este procedimiento ingenioso, </text:span></text:p>
          </draw:text-box>
        </draw:frame>
        <draw:frame draw:style-name="gr1" draw:text-style-name="P2" draw:layer="layout" svg:width="16.202cm" svg:height="0.471cm" svg:x="2.541cm" svg:y="9.336cm">
          <draw:text-box>
            <text:p text:style-name="P1"><text:span text:style-name="T2">los usuarios, sin importar su localización, pueden interactuar con los datos sin estar atados a un </text:span></text:p>
          </draw:text-box>
        </draw:frame>
        <draw:frame draw:style-name="gr1" draw:text-style-name="P2" draw:layer="layout" svg:width="16.156cm" svg:height="0.471cm" svg:x="2.541cm" svg:y="9.9cm">
          <draw:text-box>
            <text:p text:style-name="P1"><text:span text:style-name="T2">único <text:s/>punto <text:s/>de <text:s/>servicio, <text:s/>mitigando <text:s/>la <text:s/>posibilidad <text:s/>de <text:s/>interrupciones <text:s/>si <text:s/>surgiesen <text:s/>fallos <text:s/>o </text:span></text:p>
          </draw:text-box>
        </draw:frame>
        <draw:frame draw:style-name="gr1" draw:text-style-name="P2" draw:layer="layout" svg:width="4.916cm" svg:height="0.471cm" svg:x="2.541cm" svg:y="10.457cm">
          <draw:text-box>
            <text:p text:style-name="P1"><text:span text:style-name="T2">inconvenientes de conexión. </text:span></text:p>
          </draw:text-box>
        </draw:frame>
        <draw:frame draw:style-name="gr1" draw:text-style-name="P2" draw:layer="layout" svg:width="14.438cm" svg:height="0.471cm" svg:x="3.794cm" svg:y="11.515cm">
          <draw:text-box>
            <text:p text:style-name="P1"><text:span text:style-name="T2">En <text:s/>el <text:s/>contexto <text:s/>de <text:s/>una <text:s/>base <text:s/>de <text:s/>datos <text:s/>distribuida, <text:s/>la <text:s/>replicación <text:s/>habilita <text:s/>que <text:s/>la </text:span></text:p>
          </draw:text-box>
        </draw:frame>
        <draw:frame draw:style-name="gr1" draw:text-style-name="P2" draw:layer="layout" svg:width="16.107cm" svg:height="0.471cm" svg:x="2.541cm" svg:y="12.071cm">
          <draw:text-box>
            <text:p text:style-name="P1"><text:span text:style-name="T2">información esté presente simultáneamente en varios emplazamientos geográficos. A modo de </text:span></text:p>
          </draw:text-box>
        </draw:frame>
        <draw:frame draw:style-name="gr1" draw:text-style-name="P2" draw:layer="layout" svg:width="15.93cm" svg:height="0.471cm" svg:x="2.541cm" svg:y="12.626cm">
          <draw:text-box>
            <text:p text:style-name="P1"><text:span text:style-name="T2">illustration, una corporación con alcance global podría disponer de servidores establecidos en </text:span></text:p>
          </draw:text-box>
        </draw:frame>
        <draw:frame draw:style-name="gr1" draw:text-style-name="P2" draw:layer="layout" svg:width="15.473cm" svg:height="0.471cm" svg:x="2.541cm" svg:y="13.191cm">
          <draw:text-box>
            <text:p text:style-name="P1"><text:span text:style-name="T2">Costa Rica, México y Estados Unidos, cada uno alojando una réplica de tablas o grupos de </text:span></text:p>
          </draw:text-box>
        </draw:frame>
        <draw:frame draw:style-name="gr1" draw:text-style-name="P2" draw:layer="layout" svg:width="16.048cm" svg:height="0.471cm" svg:x="2.541cm" svg:y="13.747cm">
          <draw:text-box>
            <text:p text:style-name="P1"><text:span text:style-name="T2">datos específicos. Por consiguiente, los usuarios residentes en cada zona tendrían la capacidad </text:span></text:p>
          </draw:text-box>
        </draw:frame>
        <draw:frame draw:style-name="gr1" draw:text-style-name="P2" draw:layer="layout" svg:width="15.684cm" svg:height="0.471cm" svg:x="2.541cm" svg:y="14.311cm">
          <draw:text-box>
            <text:p text:style-name="P1"><text:span text:style-name="T2">de consultar datos desde el servidor más próximo a ellos, logrando de esta manera consultas </text:span></text:p>
          </draw:text-box>
        </draw:frame>
        <draw:frame draw:style-name="gr1" draw:text-style-name="P2" draw:layer="layout" svg:width="13.402cm" svg:height="0.471cm" svg:x="2.541cm" svg:y="14.867cm">
          <draw:text-box>
            <text:p text:style-name="P1"><text:span text:style-name="T2">más veloces y además minimizando el tráfico de red entre las diferentes sedes. </text:span></text:p>
          </draw:text-box>
        </draw:frame>
        <draw:frame draw:style-name="gr1" draw:text-style-name="P2" draw:layer="layout" svg:width="15.002cm" svg:height="0.471cm" svg:x="3.794cm" svg:y="15.925cm">
          <draw:text-box>
            <text:p text:style-name="P1"><text:span text:style-name="T2">Además, varios enfoques de replicación están a nuestra disposición. La replicación total </text:span></text:p>
          </draw:text-box>
        </draw:frame>
        <draw:frame draw:style-name="gr1" draw:text-style-name="P2" draw:layer="layout" svg:width="15.306cm" svg:height="0.471cm" svg:x="2.541cm" svg:y="16.482cm">
          <draw:text-box>
            <text:p text:style-name="P1"><text:span text:style-name="T2">sucede cuando cada nodo alberga una copia exacta de la totalidad de la base de datos. Esa </text:span></text:p>
          </draw:text-box>
        </draw:frame>
        <draw:frame draw:style-name="gr1" draw:text-style-name="P2" draw:layer="layout" svg:width="16.2cm" svg:height="0.471cm" svg:x="2.541cm" svg:y="17.047cm">
          <draw:text-box>
            <text:p text:style-name="P1"><text:span text:style-name="T2">estrategia brinda excelente disponibilidad además simplifica el acceso local la información; sin </text:span></text:p>
          </draw:text-box>
        </draw:frame>
        <draw:frame draw:style-name="gr1" draw:text-style-name="P2" draw:layer="layout" svg:width="15.789cm" svg:height="0.471cm" svg:x="2.541cm" svg:y="17.602cm">
          <draw:text-box>
            <text:p text:style-name="P1"><text:span text:style-name="T2">embargo, esta necesita considerable espacio almacenamiento así como intrincados esquemas </text:span></text:p>
          </draw:text-box>
        </draw:frame>
        <draw:frame draw:style-name="gr1" draw:text-style-name="P2" draw:layer="layout" svg:width="15.743cm" svg:height="0.471cm" svg:x="2.541cm" svg:y="18.167cm">
          <draw:text-box>
            <text:p text:style-name="P1"><text:span text:style-name="T2">sincronización. <text:s/>Por <text:s/>un <text:s/>lado, <text:s/>la <text:s/>replicación <text:s/>parcial <text:s/>consiste <text:s/>en <text:s/>replicar <text:s/>solo <text:s/>segmentos </text:span></text:p>
          </draw:text-box>
        </draw:frame>
        <draw:frame draw:style-name="gr1" draw:text-style-name="P2" draw:layer="layout" svg:width="15.755cm" svg:height="0.471cm" svg:x="2.541cm" svg:y="18.722cm">
          <draw:text-box>
            <text:p text:style-name="P1"><text:span text:style-name="T2">específicos <text:s/>o <text:s/>tablas <text:s/>detalladas <text:s/>en <text:s/>variados <text:s/>nodos, <text:s/>mitigando <text:s/>el <text:s/>gasto <text:s/>recursos <text:s/>además </text:span></text:p>
          </draw:text-box>
        </draw:frame>
        <draw:frame draw:style-name="gr1" draw:text-style-name="P2" draw:layer="layout" svg:width="15.825cm" svg:height="0.471cm" svg:x="2.541cm" svg:y="19.287cm">
          <draw:text-box>
            <text:p text:style-name="P1"><text:span text:style-name="T2">posibilitando una más efectiva distribución datos. Una distinción esencial también diferencia </text:span></text:p>
          </draw:text-box>
        </draw:frame>
        <draw:frame draw:style-name="gr1" draw:text-style-name="P2" draw:layer="layout" svg:width="15.565cm" svg:height="0.471cm" svg:x="2.541cm" svg:y="19.843cm">
          <draw:text-box>
            <text:p text:style-name="P1"><text:span text:style-name="T2">la replicación síncrona de la asíncrona. Con la replicación síncrona, cualquier modificación </text:span></text:p>
          </draw:text-box>
        </draw:frame>
        <draw:frame draw:style-name="gr1" draw:text-style-name="P2" draw:layer="layout" svg:width="15.719cm" svg:height="0.471cm" svg:x="2.541cm" svg:y="20.407cm">
          <draw:text-box>
            <text:p text:style-name="P1"><text:span text:style-name="T2">hecha <text:s/>una <text:s/>instancia <text:s/>datos <text:s/>debe <text:s/>validarse <text:s/>sin <text:s/>demora <text:s/>en <text:s/>todas <text:s/>otras <text:s/>copias <text:s/>previo <text:s/>ser </text:span></text:p>
          </draw:text-box>
        </draw:frame>
        <draw:frame draw:style-name="gr1" draw:text-style-name="P2" draw:layer="layout" svg:width="15.966cm" svg:height="0.471cm" svg:x="2.541cm" svg:y="20.963cm">
          <draw:text-box>
            <text:p text:style-name="P1"><text:span text:style-name="T2">considerada <text:s/>terminada. <text:s/>Eso <text:s/>asegura <text:s/>consistencia <text:s/>elevada <text:s/>pues <text:s/>todos <text:s/>servidores <text:s/>ostentan </text:span></text:p>
          </draw:text-box>
        </draw:frame>
        <draw:frame draw:style-name="gr1" draw:text-style-name="P2" draw:layer="layout" svg:width="16.308cm" svg:height="0.471cm" svg:x="2.541cm" svg:y="21.528cm">
          <draw:text-box>
            <text:p text:style-name="P1"><text:span text:style-name="T2">precisamente los mismos datos. No obstante, ello puede impactar desempeño debido la dilación </text:span></text:p>
          </draw:text-box>
        </draw:frame>
        <draw:frame draw:style-name="gr1" draw:text-style-name="P2" draw:layer="layout" svg:width="10.346cm" svg:height="0.471cm" svg:x="2.541cm" svg:y="22.083cm">
          <draw:text-box>
            <text:p text:style-name="P1"><text:span text:style-name="T2">requerida para sincronizar cambios entre distintas máquinas. </text:span></text:p>
          </draw:text-box>
        </draw:frame>
        <draw:frame draw:style-name="gr1" draw:text-style-name="P2" draw:layer="layout" svg:width="14.448cm" svg:height="0.471cm" svg:x="3.794cm" svg:y="23.143cm">
          <draw:text-box>
            <text:p text:style-name="P1"><text:span text:style-name="T2">Por el contrario, la replicación asíncrona autoriza que modificaciones se diseminen a </text:span></text:p>
          </draw:text-box>
        </draw:frame>
        <draw:frame draw:style-name="gr1" draw:text-style-name="P2" draw:layer="layout" svg:width="16.036cm" svg:height="0.471cm" svg:x="2.541cm" svg:y="23.698cm">
          <draw:text-box>
            <text:p text:style-name="P1"><text:span text:style-name="T2">otras <text:s/>copias <text:s/>luego <text:s/>ser <text:s/>efectuadas <text:s/>en <text:s/>el <text:s/>nodo <text:s/>principal. <text:s/>Si <text:s/>bien <text:s/>esta <text:s/>técnica <text:s/>potencia <text:s/>el </text:span></text:p>
          </draw:text-box>
        </draw:frame>
        <draw:frame draw:style-name="gr1" draw:text-style-name="P2" draw:layer="layout" svg:width="6.538cm" svg:height="0.471cm" svg:x="2.541cm" svg:y="24.254cm">
          <draw:text-box>
            <text:p text:style-name="P1"><text:span text:style-name="T2">rendimiento <text:s/>y <text:s/>minimiza <text:s/>la <text:s/>latencia, </text:span></text:p>
          </draw:text-box>
        </draw:frame>
        <draw:frame draw:style-name="gr1" draw:text-style-name="P2" draw:layer="layout" svg:width="9.019cm" svg:height="0.471cm" svg:x="9.327cm" svg:y="24.254cm">
          <draw:text-box>
            <text:p text:style-name="P1"><text:span text:style-name="T2">es <text:s/>verdad <text:s/>que <text:s/>breves <text:s/>instantes <text:s/>podrían <text:s/>ver <text:s/>datos </text:span></text:p>
          </draw:text-box>
        </draw:frame>
        <draw:frame draw:style-name="gr1" draw:text-style-name="P2" draw:layer="layout" svg:width="15.966cm" svg:height="0.471cm" svg:x="2.541cm" svg:y="24.818cm">
          <draw:text-box>
            <text:p text:style-name="P1"><text:span text:style-name="T2">desactualizados <text:s/>en <text:s/>algunas <text:s/>copias. <text:s/>Por <text:s/>esto <text:s/>muchas <text:s/>plataformas <text:s/>modernas <text:s/>adopten <text:s/>esta </text:span></text:p>
          </draw:text-box>
        </draw:frame>
        <draw:frame draw:style-name="gr1" draw:text-style-name="P2" draw:layer="layout" svg:width="2.33cm" svg:height="0.471cm" svg:x="2.541cm" svg:y="25.375cm">
          <draw:text-box>
            <text:p text:style-name="P1"><text:span text:style-name="T2">metodología, </text:span></text:p>
          </draw:text-box>
        </draw:frame>
        <draw:frame draw:style-name="gr1" draw:text-style-name="P2" draw:layer="layout" svg:width="2.247cm" svg:height="0.471cm" svg:x="5.045cm" svg:y="25.375cm">
          <draw:text-box>
            <text:p text:style-name="P1"><text:span text:style-name="T2">equilibrando </text:span></text:p>
          </draw:text-box>
        </draw:frame>
        <draw:frame draw:style-name="gr1" draw:text-style-name="P2" draw:layer="layout" svg:width="0.422cm" svg:height="0.471cm" svg:x="7.461cm" svg:y="25.375cm">
          <draw:text-box>
            <text:p text:style-name="P1"><text:span text:style-name="T2">la </text:span></text:p>
          </draw:text-box>
        </draw:frame>
        <draw:frame draw:style-name="gr1" draw:text-style-name="P2" draw:layer="layout" svg:width="1.353cm" svg:height="0.471cm" svg:x="8.051cm" svg:y="25.375cm">
          <draw:text-box>
            <text:p text:style-name="P1"><text:span text:style-name="T2">rapidez </text:span></text:p>
          </draw:text-box>
        </draw:frame>
        <draw:frame draw:style-name="gr1" draw:text-style-name="P2" draw:layer="layout" svg:width="0.422cm" svg:height="0.471cm" svg:x="9.584cm" svg:y="25.375cm">
          <draw:text-box>
            <text:p text:style-name="P1"><text:span text:style-name="T2">y </text:span></text:p>
          </draw:text-box>
        </draw:frame>
        <draw:frame draw:style-name="gr1" draw:text-style-name="P2" draw:layer="layout" svg:width="0.422cm" svg:height="0.471cm" svg:x="10.078cm" svg:y="25.375cm">
          <draw:text-box>
            <text:p text:style-name="P1"><text:span text:style-name="T2">la </text:span></text:p>
          </draw:text-box>
        </draw:frame>
        <draw:frame draw:style-name="gr1" draw:text-style-name="P2" draw:layer="layout" svg:width="2.53cm" svg:height="0.471cm" svg:x="10.668cm" svg:y="25.375cm">
          <draw:text-box>
            <text:p text:style-name="P1"><text:span text:style-name="T2">disponibilidad </text:span></text:p>
          </draw:text-box>
        </draw:frame>
        <draw:frame draw:style-name="gr1" draw:text-style-name="P2" draw:layer="layout" svg:width="0.507cm" svg:height="0.471cm" svg:x="13.374cm" svg:y="25.375cm">
          <draw:text-box>
            <text:p text:style-name="P1"><text:span text:style-name="T2">de </text:span></text:p>
          </draw:text-box>
        </draw:frame>
        <draw:frame draw:style-name="gr1" draw:text-style-name="P2" draw:layer="layout" svg:width="1.119cm" svg:height="0.471cm" svg:x="14.061cm" svg:y="25.375cm">
          <draw:text-box>
            <text:p text:style-name="P1"><text:span text:style-name="T2">forma </text:span></text:p>
          </draw:text-box>
        </draw:frame>
        <draw:frame draw:style-name="gr1" draw:text-style-name="P2" draw:layer="layout" svg:width="1.576cm" svg:height="0.471cm" svg:x="15.357cm" svg:y="25.375cm">
          <draw:text-box>
            <text:p text:style-name="P1"><text:span text:style-name="T2">correcta. </text:span></text:p>
          </draw:text-box>
        </draw:frame>
        <draw:frame draw:style-name="gr1" draw:text-style-name="P2" draw:layer="layout" svg:width="0.554cm" svg:height="0.471cm" svg:x="17.126cm" svg:y="25.375cm">
          <draw:text-box>
            <text:p text:style-name="P1"><text:span text:style-name="T2">La </text:span></text:p>
          </draw:text-box>
        </draw:frame>
        <draw:frame draw:style-name="gr1" draw:text-style-name="P2" draw:layer="layout" svg:width="0.719cm" svg:height="0.471cm" svg:x="17.848cm" svg:y="25.375cm">
          <draw:text-box>
            <text:p text:style-name="P1"><text:span text:style-name="T2">alta </text:span></text:p>
          </draw:text-box>
        </draw:frame>
        <draw:frame draw:style-name="gr1" draw:text-style-name="P2" draw:layer="layout" svg:width="15.438cm" svg:height="0.471cm" svg:x="2.541cm" svg:y="25.939cm">
          <draw:text-box>
            <text:p text:style-name="P1"><text:span text:style-name="T2">disponibilidad de la información es la virtud fundamental de la replicación. Así pues, si un </text:span></text:p>
          </draw:text-box>
        </draw:frame>
        <draw:frame draw:style-name="gr1" draw:text-style-name="P2" draw:layer="layout" svg:width="15.919cm" svg:height="0.471cm" svg:x="2.541cm" svg:y="26.495cm">
          <draw:text-box>
            <text:p text:style-name="P1"><text:span text:style-name="T2">servidor cae por fallos técnicos, mantenimiento o de red, los usuarios podrán seguir operando </text:span></text:p>
          </draw:text-box>
        </draw:frame>
      </draw:page>
      <draw:page draw:name="page7" draw:style-name="dp1" draw:master-page-name="master-page3">
        <draw:frame draw:style-name="gr1" draw:text-style-name="P2" draw:layer="layout" svg:width="0.422cm" svg:height="0.497cm" svg:x="2.532cm" svg:y="1.275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97cm" svg:x="10.5cm" svg:y="1.275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97cm" svg:x="18.238cm" svg:y="1.275cm">
          <draw:text-box>
            <text:p text:style-name="P1"><text:span text:style-name="T1">7 </text:span></text:p>
          </draw:text-box>
        </draw:frame>
        <draw:frame draw:style-name="gr1" draw:text-style-name="P2" draw:layer="layout" svg:width="0.422cm" svg:height="0.497cm" svg:x="2.541cm" svg:y="1.804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97cm" svg:x="2.532cm" svg:y="27.396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97cm" svg:x="10.5cm" svg:y="27.396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97cm" svg:x="18.467cm" svg:y="27.396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97cm" svg:x="2.541cm" svg:y="27.926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15.847cm" svg:height="0.471cm" svg:x="2.541cm" svg:y="2.561cm">
          <draw:text-box>
            <text:p text:style-name="P1"><text:span text:style-name="T2">con otras copias. Importante es esto en aplicaciones de gran criticidad como banca, comercio </text:span></text:p>
          </draw:text-box>
        </draw:frame>
        <draw:frame draw:style-name="gr1" draw:text-style-name="P2" draw:layer="layout" svg:width="16.058cm" svg:height="0.471cm" svg:x="2.541cm" svg:y="3.116cm">
          <draw:text-box>
            <text:p text:style-name="P1"><text:span text:style-name="T2">electrónico, sanidad o redes sociales, donde la interrupción trae pérdidas financieras o afecta a </text:span></text:p>
          </draw:text-box>
        </draw:frame>
        <draw:frame draw:style-name="gr1" draw:text-style-name="P2" draw:layer="layout" svg:width="1.131cm" svg:height="0.471cm" svg:x="2.541cm" svg:y="3.681cm">
          <draw:text-box>
            <text:p text:style-name="P1"><text:span text:style-name="T2">miles. </text:span></text:p>
          </draw:text-box>
        </draw:frame>
        <draw:frame draw:style-name="gr1" draw:text-style-name="P2" draw:layer="layout" svg:width="14.627cm" svg:height="0.471cm" svg:x="3.794cm" svg:y="4.731cm">
          <draw:text-box>
            <text:p text:style-name="P1"><text:span text:style-name="T2">No solo la disponibilidad mejora, sino que la replicación contribuye a la optimización </text:span></text:p>
          </draw:text-box>
        </draw:frame>
        <draw:frame draw:style-name="gr1" draw:text-style-name="P2" draw:layer="layout" svg:width="15.955cm" svg:height="0.471cm" svg:x="2.541cm" svg:y="5.295cm">
          <draw:text-box>
            <text:p text:style-name="P1"><text:span text:style-name="T2">del performance en consultas. Distribuidas las peticiones en servidores variados se disminuye </text:span></text:p>
          </draw:text-box>
        </draw:frame>
        <draw:frame draw:style-name="gr1" draw:text-style-name="P2" draw:layer="layout" svg:width="15.79cm" svg:height="0.471cm" svg:x="2.541cm" svg:y="5.851cm">
          <draw:text-box>
            <text:p text:style-name="P1"><text:span text:style-name="T2">la carga sobre un nodo solo, eludiendo gargantas de botella. Entonces el sistema atiende más </text:span></text:p>
          </draw:text-box>
        </draw:frame>
        <draw:frame draw:style-name="gr1" draw:text-style-name="P2" draw:layer="layout" svg:width="16.354cm" svg:height="0.471cm" svg:x="2.541cm" svg:y="6.416cm">
          <draw:text-box>
            <text:p text:style-name="P1"><text:span text:style-name="T2">usuarios a la vez, brindando respuestas más ágiles. Sin embargo, replicación tiene también retos </text:span></text:p>
          </draw:text-box>
        </draw:frame>
        <draw:frame draw:style-name="gr1" draw:text-style-name="P2" draw:layer="layout" svg:width="16.106cm" svg:height="0.471cm" svg:x="2.541cm" svg:y="6.971cm">
          <draw:text-box>
            <text:p text:style-name="P1"><text:span text:style-name="T2">importantes. Un gran problema es mantener la coherencia entre copias de datos. Cuando algún </text:span></text:p>
          </draw:text-box>
        </draw:frame>
        <draw:frame draw:style-name="gr1" draw:text-style-name="P2" draw:layer="layout" svg:width="15.354cm" svg:height="0.471cm" svg:x="2.541cm" svg:y="7.537cm">
          <draw:text-box>
            <text:p text:style-name="P1"><text:span text:style-name="T2">dato cambia en un servidor, el cambio necesita propagarse bien a otras réplicas. Si esto no </text:span></text:p>
          </draw:text-box>
        </draw:frame>
        <draw:frame draw:style-name="gr1" draw:text-style-name="P2" draw:layer="layout" svg:width="16.118cm" svg:height="0.471cm" svg:x="2.541cm" svg:y="8.092cm">
          <draw:text-box>
            <text:p text:style-name="P1"><text:span text:style-name="T2">funciona bien o se retrasa, pueden haber inconsistencias que causen problemas con búsquedas, </text:span></text:p>
          </draw:text-box>
        </draw:frame>
        <draw:frame draw:style-name="gr1" draw:text-style-name="P2" draw:layer="layout" svg:width="15.85cm" svg:height="0.471cm" svg:x="2.541cm" svg:y="8.657cm">
          <draw:text-box>
            <text:p text:style-name="P1"><text:span text:style-name="T2">informes o transacciones. Es por esto que sistemas distribuidos usan control y sincronización </text:span></text:p>
          </draw:text-box>
        </draw:frame>
        <draw:frame draw:style-name="gr1" draw:text-style-name="P2" draw:layer="layout" svg:width="4.715cm" svg:height="0.471cm" svg:x="2.541cm" svg:y="9.212cm">
          <draw:text-box>
            <text:p text:style-name="P1"><text:span text:style-name="T2">para asegurar la integridad. </text:span></text:p>
          </draw:text-box>
        </draw:frame>
        <draw:frame draw:style-name="gr1" draw:text-style-name="P2" draw:layer="layout" svg:width="14.438cm" svg:height="0.471cm" svg:x="3.794cm" svg:y="10.271cm">
          <draw:text-box>
            <text:p text:style-name="P1"><text:span text:style-name="T2">La replicación de datos es clave para bases de datos distribuidas. Su habilidad de dar </text:span></text:p>
          </draw:text-box>
        </draw:frame>
        <draw:frame draw:style-name="gr1" draw:text-style-name="P2" draw:layer="layout" svg:width="16.223cm" svg:height="0.471cm" svg:x="2.541cm" svg:y="10.827cm">
          <draw:text-box>
            <text:p text:style-name="P1"><text:span text:style-name="T2">más disponibilidad, tolerancia a errores y velocidad la hace fundamental para empresas de hoy. </text:span></text:p>
          </draw:text-box>
        </draw:frame>
        <draw:frame draw:style-name="gr1" draw:text-style-name="P2" draw:layer="layout" svg:width="16.53cm" svg:height="0.471cm" svg:x="2.541cm" svg:y="11.391cm">
          <draw:text-box>
            <text:p text:style-name="P1"><text:span text:style-name="T2">Si <text:s/>bien <text:s/>trae <text:s/>problemas <text:s/>con <text:s/>sincronización <text:s/>y <text:s/>coherencia, <text:s/>los <text:s/>puntos <text:s/>buenos <text:s/>permiten <text:s/>crear </text:span></text:p>
          </draw:text-box>
        </draw:frame>
        <draw:frame draw:style-name="gr1" draw:text-style-name="P2" draw:layer="layout" svg:width="15.779cm" svg:height="0.471cm" svg:x="2.541cm" svg:y="11.947cm">
          <draw:text-box>
            <text:p text:style-name="P1"><text:span text:style-name="T2">sistemas más fuertes, escalables y listos para funcionar mundialmente donde los datos deben </text:span></text:p>
          </draw:text-box>
        </draw:frame>
        <draw:frame draw:style-name="gr1" draw:text-style-name="P2" draw:layer="layout" svg:width="4.28cm" svg:height="0.471cm" svg:x="2.541cm" svg:y="12.512cm">
          <draw:text-box>
            <text:p text:style-name="P1"><text:span text:style-name="T2">estar siempre accesibles. </text:span></text:p>
          </draw:text-box>
        </draw:frame>
        <draw:frame draw:style-name="gr1" draw:text-style-name="P2" draw:layer="layout" svg:width="5.825cm" svg:height="0.471cm" svg:x="2.541cm" svg:y="13.703cm">
          <draw:text-box>
            <text:p text:style-name="P1"><text:span text:style-name="T3">6. Consistencia y disponibilidad </text:span></text:p>
          </draw:text-box>
        </draw:frame>
        <draw:frame draw:style-name="gr1" draw:text-style-name="P2" draw:layer="layout" svg:width="16.226cm" svg:height="0.471cm" svg:x="2.541cm" svg:y="14.408cm">
          <draw:text-box>
            <text:p text:style-name="P1"><text:span text:style-name="T2">Uno <text:s/>de <text:s/>los <text:s/>temas <text:s/>más <text:s/>importantes <text:s/>en <text:s/>bases <text:s/>de <text:s/>datos <text:s/>distribuidas <text:s/>es <text:s/>la <text:s/>consistencia. <text:s/>La </text:span></text:p>
          </draw:text-box>
        </draw:frame>
        <draw:frame draw:style-name="gr1" draw:text-style-name="P2" draw:layer="layout" svg:width="15.508cm" svg:height="0.471cm" svg:x="2.541cm" svg:y="14.973cm">
          <draw:text-box>
            <text:p text:style-name="P1"><text:span text:style-name="T2">consistencia significa que los datos deben mantenerse correctos y actualizados en todos los </text:span></text:p>
          </draw:text-box>
        </draw:frame>
        <draw:frame draw:style-name="gr1" draw:text-style-name="P2" draw:layer="layout" svg:width="16.305cm" svg:height="0.471cm" svg:x="2.541cm" svg:y="15.546cm">
          <draw:text-box>
            <text:p text:style-name="P1"><text:span text:style-name="T2">servidores. Por ejemplo, si una persona hace una transferencia bancaria, el sistema debe reflejar </text:span></text:p>
          </draw:text-box>
        </draw:frame>
        <draw:frame draw:style-name="gr1" draw:text-style-name="P2" draw:layer="layout" svg:width="10.592cm" svg:height="0.471cm" svg:x="2.541cm" svg:y="16.111cm">
          <draw:text-box>
            <text:p text:style-name="P1"><text:span text:style-name="T2">correctamente el dinero que salió de una cuenta y llegó a otra. </text:span></text:p>
          </draw:text-box>
        </draw:frame>
        <draw:frame draw:style-name="gr1" draw:text-style-name="P2" draw:layer="layout" svg:width="15.79cm" svg:height="0.471cm" svg:x="2.541cm" svg:y="16.958cm">
          <draw:text-box>
            <text:p text:style-name="P1"><text:span text:style-name="T2">El problema es que en sistemas distribuidos no siempre es fácil mantener todo actualizado al </text:span></text:p>
          </draw:text-box>
        </draw:frame>
        <draw:frame draw:style-name="gr1" draw:text-style-name="P2" draw:layer="layout" svg:width="16.132cm" svg:height="0.471cm" svg:x="2.541cm" svg:y="17.523cm">
          <draw:text-box>
            <text:p text:style-name="P1"><text:span text:style-name="T2">mismo tiempo. Por eso se habla del teorema CAP, que explica que un sistema distribuido debe </text:span></text:p>
          </draw:text-box>
        </draw:frame>
        <draw:frame draw:style-name="gr1" draw:text-style-name="P2" draw:layer="layout" svg:width="15.978cm" svg:height="0.471cm" svg:x="2.541cm" svg:y="18.087cm">
          <draw:text-box>
            <text:p text:style-name="P1"><text:span text:style-name="T2">equilibrar tres aspectos: consistencia, disponibilidad y tolerancia a particiones. Según IBM, el </text:span></text:p>
          </draw:text-box>
        </draw:frame>
        <draw:frame draw:style-name="gr1" draw:text-style-name="P2" draw:layer="layout" svg:width="16.365cm" svg:height="0.471cm" svg:x="2.541cm" svg:y="18.652cm">
          <draw:text-box>
            <text:p text:style-name="P1"><text:span text:style-name="T2">teorema CAP indica que un sistema distribuido no puede garantizar perfectamente las tres cosas </text:span></text:p>
          </draw:text-box>
        </draw:frame>
        <draw:frame draw:style-name="gr1" draw:text-style-name="P2" draw:layer="layout" svg:width="10.171cm" svg:height="0.471cm" svg:x="2.541cm" svg:y="19.226cm">
          <draw:text-box>
            <text:p text:style-name="P1"><text:span text:style-name="T2">al mismo tiempo; normalmente debe priorizar dos de ellas. <text:s/></text:span></text:p>
          </draw:text-box>
        </draw:frame>
        <draw:frame draw:style-name="gr1" draw:text-style-name="P2" draw:layer="layout" svg:width="15.579cm" svg:height="0.471cm" svg:x="2.541cm" svg:y="20.072cm">
          <draw:text-box>
            <text:p text:style-name="P1"><text:span text:style-name="T2">Esto significa que algunos sistemas prefieren responder siempre aunque los datos tarden un </text:span></text:p>
          </draw:text-box>
        </draw:frame>
        <draw:frame draw:style-name="gr1" draw:text-style-name="P2" draw:layer="layout" svg:width="16.259cm" svg:height="0.471cm" svg:x="2.541cm" svg:y="20.637cm">
          <draw:text-box>
            <text:p text:style-name="P1"><text:span text:style-name="T2">poco <text:s/>en <text:s/>actualizarse, <text:s/>mientras <text:s/>que <text:s/>otros <text:s/>prefieren <text:s/>asegurar <text:s/>datos <text:s/>totalmente <text:s/>consistentes, </text:span></text:p>
          </draw:text-box>
        </draw:frame>
        <draw:frame draw:style-name="gr1" draw:text-style-name="P2" draw:layer="layout" svg:width="16.143cm" svg:height="0.471cm" svg:x="2.541cm" svg:y="21.201cm">
          <draw:text-box>
            <text:p text:style-name="P1"><text:span text:style-name="T2">aunque eso pueda hacer que el sistema sea más lento o menos disponible en ciertos momentos. </text:span></text:p>
          </draw:text-box>
        </draw:frame>
        <draw:frame draw:style-name="gr1" draw:text-style-name="P2" draw:layer="layout" svg:width="10.786cm" svg:height="0.471cm" svg:x="2.541cm" svg:y="22.402cm">
          <draw:text-box>
            <text:p text:style-name="P1"><text:span text:style-name="T3">7. Ventajas y Desventajas de las bases de datos distribuidas </text:span></text:p>
          </draw:text-box>
        </draw:frame>
        <draw:frame draw:style-name="gr1" draw:text-style-name="P2" draw:layer="layout" svg:width="1.695cm" svg:height="0.471cm" svg:x="2.541cm" svg:y="23.107cm">
          <draw:text-box>
            <text:p text:style-name="P1"><text:span text:style-name="T2">Ventajas. </text:span></text:p>
          </draw:text-box>
        </draw:frame>
        <draw:frame draw:style-name="gr1" draw:text-style-name="P2" draw:layer="layout" svg:width="14.321cm" svg:height="0.471cm" svg:x="3.794cm" svg:y="23.963cm">
          <draw:text-box>
            <text:p text:style-name="P1"><text:span text:style-name="T2">Una ventaja <text:s/>importante de <text:s/>las bases de datos distribuidas es que pueden dar mayor </text:span></text:p>
          </draw:text-box>
        </draw:frame>
        <draw:frame draw:style-name="gr1" draw:text-style-name="P2" draw:layer="layout" svg:width="16.318cm" svg:height="0.471cm" svg:x="2.541cm" svg:y="24.527cm">
          <draw:text-box>
            <text:p text:style-name="P1"><text:span text:style-name="T2">disponibilidad. Esto quiere decir que, si una parte del sistema falla, no necesariamente se pierde </text:span></text:p>
          </draw:text-box>
        </draw:frame>
        <draw:frame draw:style-name="gr1" draw:text-style-name="P2" draw:layer="layout" svg:width="15.331cm" svg:height="0.471cm" svg:x="2.541cm" svg:y="25.092cm">
          <draw:text-box>
            <text:p text:style-name="P1"><text:span text:style-name="T2">todo el acceso a la información. Por ejemplo, si una sede tiene un problema, otra parte del </text:span></text:p>
          </draw:text-box>
        </draw:frame>
        <draw:frame draw:style-name="gr1" draw:text-style-name="P2" draw:layer="layout" svg:width="9.443cm" svg:height="0.471cm" svg:x="2.541cm" svg:y="25.657cm">
          <draw:text-box>
            <text:p text:style-name="P1"><text:span text:style-name="T2">sistema podría seguir trabajando con sus propios datos. </text:span></text:p>
          </draw:text-box>
        </draw:frame>
      </draw:page>
      <draw:page draw:name="page8" draw:style-name="dp1" draw:master-page-name="master-page3">
        <draw:frame draw:style-name="gr1" draw:text-style-name="P2" draw:layer="layout" svg:width="0.422cm" svg:height="0.497cm" svg:x="2.532cm" svg:y="1.275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97cm" svg:x="10.5cm" svg:y="1.275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97cm" svg:x="18.238cm" svg:y="1.275cm">
          <draw:text-box>
            <text:p text:style-name="P1"><text:span text:style-name="T1">8 </text:span></text:p>
          </draw:text-box>
        </draw:frame>
        <draw:frame draw:style-name="gr1" draw:text-style-name="P2" draw:layer="layout" svg:width="0.422cm" svg:height="0.497cm" svg:x="2.541cm" svg:y="1.804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97cm" svg:x="2.532cm" svg:y="27.396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97cm" svg:x="10.5cm" svg:y="27.396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97cm" svg:x="18.467cm" svg:y="27.396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97cm" svg:x="2.541cm" svg:y="27.926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14.483cm" svg:height="0.471cm" svg:x="3.794cm" svg:y="2.561cm">
          <draw:text-box>
            <text:p text:style-name="P1"><text:span text:style-name="T2">Otra <text:s/>ventaja <text:s/>es <text:s/>que <text:s/>puede <text:s/>mejorar <text:s/>el <text:s/>rendimiento. <text:s/>Si <text:s/>cada <text:s/>sede <text:s/>tiene <text:s/>cerca <text:s/>la </text:span></text:p>
          </draw:text-box>
        </draw:frame>
        <draw:frame draw:style-name="gr1" draw:text-style-name="P2" draw:layer="layout" svg:width="15.38cm" svg:height="0.471cm" svg:x="2.541cm" svg:y="3.125cm">
          <draw:text-box>
            <text:p text:style-name="P1"><text:span text:style-name="T2">información que más usa, las consultas pueden ser más rápidas. No es lo mismo que todos </text:span></text:p>
          </draw:text-box>
        </draw:frame>
        <draw:frame draw:style-name="gr1" draw:text-style-name="P2" draw:layer="layout" svg:width="16.047cm" svg:height="0.471cm" svg:x="2.541cm" svg:y="3.69cm">
          <draw:text-box>
            <text:p text:style-name="P1"><text:span text:style-name="T2">tengan que consultar una sola base central, a que cada sede pueda trabajar con los datos que le </text:span></text:p>
          </draw:text-box>
        </draw:frame>
        <draw:frame draw:style-name="gr1" draw:text-style-name="P2" draw:layer="layout" svg:width="2.494cm" svg:height="0.471cm" svg:x="2.541cm" svg:y="4.255cm">
          <draw:text-box>
            <text:p text:style-name="P1"><text:span text:style-name="T2">corresponden. </text:span></text:p>
          </draw:text-box>
        </draw:frame>
        <draw:frame draw:style-name="gr1" draw:text-style-name="P2" draw:layer="layout" svg:width="14.565cm" svg:height="0.471cm" svg:x="3.794cm" svg:y="5.11cm">
          <draw:text-box>
            <text:p text:style-name="P1"><text:span text:style-name="T2">También ayudan cuando una empresa necesita crecer. Si la empresa abre más sedes o </text:span></text:p>
          </draw:text-box>
        </draw:frame>
        <draw:frame draw:style-name="gr1" draw:text-style-name="P2" draw:layer="layout" svg:width="15.389cm" svg:height="0.471cm" svg:x="2.541cm" svg:y="5.675cm">
          <draw:text-box>
            <text:p text:style-name="P1"><text:span text:style-name="T2">empieza a manejar más información, se pueden agregar más servidores o dividir mejor los </text:span></text:p>
          </draw:text-box>
        </draw:frame>
        <draw:frame draw:style-name="gr1" draw:text-style-name="P2" draw:layer="layout" svg:width="12.522cm" svg:height="0.471cm" svg:x="2.541cm" svg:y="6.239cm">
          <draw:text-box>
            <text:p text:style-name="P1"><text:span text:style-name="T2">datos. Esto hace que el sistema no dependa siempre de una sola máquina. </text:span></text:p>
          </draw:text-box>
        </draw:frame>
        <draw:frame draw:style-name="gr1" draw:text-style-name="P2" draw:layer="layout" svg:width="14.601cm" svg:height="0.471cm" svg:x="3.794cm" svg:y="7.086cm">
          <draw:text-box>
            <text:p text:style-name="P1"><text:span text:style-name="T2">Otra ventaja es que permite organizar mejor la información. Cada sede puede guardar </text:span></text:p>
          </draw:text-box>
        </draw:frame>
        <draw:frame draw:style-name="gr1" draw:text-style-name="P2" draw:layer="layout" svg:width="15.801cm" svg:height="0.471cm" svg:x="2.541cm" svg:y="7.651cm">
          <draw:text-box>
            <text:p text:style-name="P1"><text:span text:style-name="T2">sus propios clientes, ventas o productos, pero cuando se necesita hacer un reporte general, se </text:span></text:p>
          </draw:text-box>
        </draw:frame>
        <draw:frame draw:style-name="gr1" draw:text-style-name="P2" draw:layer="layout" svg:width="15.731cm" svg:height="0.471cm" svg:x="2.541cm" svg:y="8.216cm">
          <draw:text-box>
            <text:p text:style-name="P1"><text:span text:style-name="T2">pueden unir los datos. Eso es útil para ver, por ejemplo, cuánto vendió toda la empresa entre </text:span></text:p>
          </draw:text-box>
        </draw:frame>
        <draw:frame draw:style-name="gr1" draw:text-style-name="P2" draw:layer="layout" svg:width="2.247cm" svg:height="0.471cm" svg:x="2.541cm" svg:y="8.789cm">
          <draw:text-box>
            <text:p text:style-name="P1"><text:span text:style-name="T2">varias sedes. </text:span></text:p>
          </draw:text-box>
        </draw:frame>
        <draw:frame draw:style-name="gr1" draw:text-style-name="P2" draw:layer="layout" svg:width="14.436cm" svg:height="0.471cm" svg:x="3.794cm" svg:y="9.636cm">
          <draw:text-box>
            <text:p text:style-name="P1"><text:span text:style-name="T2">La replicación también puede ser una ventaja, porque permite tener copias de ciertos </text:span></text:p>
          </draw:text-box>
        </draw:frame>
        <draw:frame draw:style-name="gr1" draw:text-style-name="P2" draw:layer="layout" svg:width="16.108cm" svg:height="0.471cm" svg:x="2.541cm" svg:y="10.201cm">
          <draw:text-box>
            <text:p text:style-name="P1"><text:span text:style-name="T2">datos en varios lugares. Por ejemplo, si la tabla de productos está repetida en dos bases, ambas </text:span></text:p>
          </draw:text-box>
        </draw:frame>
        <draw:frame draw:style-name="gr1" draw:text-style-name="P2" draw:layer="layout" svg:width="14.966cm" svg:height="0.471cm" svg:x="2.541cm" svg:y="10.765cm">
          <draw:text-box>
            <text:p text:style-name="P1"><text:span text:style-name="T2">sedes pueden consultarla aunque no estén trabajando directamente sobre la misma base. </text:span></text:p>
          </draw:text-box>
        </draw:frame>
        <draw:frame draw:style-name="gr1" draw:text-style-name="P2" draw:layer="layout" svg:width="2.259cm" svg:height="0.471cm" svg:x="2.541cm" svg:y="11.612cm">
          <draw:text-box>
            <text:p text:style-name="P1"><text:span text:style-name="T2">Desventajas. </text:span></text:p>
          </draw:text-box>
        </draw:frame>
        <draw:frame draw:style-name="gr1" draw:text-style-name="P2" draw:layer="layout" svg:width="15.074cm" svg:height="0.471cm" svg:x="3.794cm" svg:y="12.459cm">
          <draw:text-box>
            <text:p text:style-name="P1"><text:span text:style-name="T2">Aunque <text:s/>las <text:s/>bases <text:s/>de <text:s/>datos <text:s/>distribuidas <text:s/>tienen <text:s/>cosas <text:s/>buenas, <text:s/>también <text:s/>tienen <text:s/>partes </text:span></text:p>
          </draw:text-box>
        </draw:frame>
        <draw:frame draw:style-name="gr1" draw:text-style-name="P2" draw:layer="layout" svg:width="16.189cm" svg:height="0.471cm" svg:x="2.541cm" svg:y="13.032cm">
          <draw:text-box>
            <text:p text:style-name="P1"><text:span text:style-name="T2">complicadas. Una desventaja es que son más difíciles de administrar. Manejar una sola base ya </text:span></text:p>
          </draw:text-box>
        </draw:frame>
        <draw:frame draw:style-name="gr1" draw:text-style-name="P2" draw:layer="layout" svg:width="16.271cm" svg:height="0.471cm" svg:x="2.541cm" svg:y="13.597cm">
          <draw:text-box>
            <text:p text:style-name="P1"><text:span text:style-name="T2">requiere <text:s/>cuidado, <text:s/>pero <text:s/>manejar <text:s/>varias <text:s/>bases <text:s/>conectadas <text:s/>entre <text:s/>sí <text:s/>ocupa <text:s/>más <text:s/>orden <text:s/>y <text:s/>más </text:span></text:p>
          </draw:text-box>
        </draw:frame>
        <draw:frame draw:style-name="gr1" draw:text-style-name="P2" draw:layer="layout" svg:width="2.565cm" svg:height="0.471cm" svg:x="2.541cm" svg:y="14.161cm">
          <draw:text-box>
            <text:p text:style-name="P1"><text:span text:style-name="T2">configuración. </text:span></text:p>
          </draw:text-box>
        </draw:frame>
        <draw:frame draw:style-name="gr1" draw:text-style-name="P2" draw:layer="layout" svg:width="14.495cm" svg:height="0.471cm" svg:x="3.794cm" svg:y="15.008cm">
          <draw:text-box>
            <text:p text:style-name="P1"><text:span text:style-name="T2">Otra desventaja es que pueden aparecer problemas de consistencia. Esto pasa cuando </text:span></text:p>
          </draw:text-box>
        </draw:frame>
        <draw:frame draw:style-name="gr1" draw:text-style-name="P2" draw:layer="layout" svg:width="15.848cm" svg:height="0.471cm" svg:x="2.541cm" svg:y="15.573cm">
          <draw:text-box>
            <text:p text:style-name="P1"><text:span text:style-name="T2">un dato se actualiza en una base, pero no en la otra. Por ejemplo, si se cambia el precio de un </text:span></text:p>
          </draw:text-box>
        </draw:frame>
        <draw:frame draw:style-name="gr1" draw:text-style-name="P2" draw:layer="layout" svg:width="15.896cm" svg:height="0.471cm" svg:x="2.541cm" svg:y="16.137cm">
          <draw:text-box>
            <text:p text:style-name="P1"><text:span text:style-name="T2">producto en Costa Rica y en México sigue el precio viejo, entonces la información ya no está </text:span></text:p>
          </draw:text-box>
        </draw:frame>
        <draw:frame draw:style-name="gr1" draw:text-style-name="P2" draw:layer="layout" svg:width="9.653cm" svg:height="0.471cm" svg:x="2.541cm" svg:y="16.711cm">
          <draw:text-box>
            <text:p text:style-name="P1"><text:span text:style-name="T2">igual. Eso puede causar errores en reportes o decisiones. </text:span></text:p>
          </draw:text-box>
        </draw:frame>
        <draw:frame draw:style-name="gr1" draw:text-style-name="P2" draw:layer="layout" svg:width="15.39cm" svg:height="0.471cm" svg:x="3.794cm" svg:y="17.558cm">
          <draw:text-box>
            <text:p text:style-name="P1"><text:span text:style-name="T2">También <text:s/>está <text:s/>el <text:s/>problema <text:s/>de <text:s/>la <text:s/>red. <text:s/>Como <text:s/>las <text:s/>bases <text:s/>tienen <text:s/>que <text:s/>comunicarse, <text:s/>si <text:s/>la </text:span></text:p>
          </draw:text-box>
        </draw:frame>
        <draw:frame draw:style-name="gr1" draw:text-style-name="P2" draw:layer="layout" svg:width="15.942cm" svg:height="0.471cm" svg:x="2.541cm" svg:y="18.122cm">
          <draw:text-box>
            <text:p text:style-name="P1"><text:span text:style-name="T2">conexión está lenta, mal configurada o se cae, las consultas distribuidas pueden fallar. En una </text:span></text:p>
          </draw:text-box>
        </draw:frame>
        <draw:frame draw:style-name="gr1" draw:text-style-name="P2" draw:layer="layout" svg:width="16.507cm" svg:height="0.471cm" svg:x="2.541cm" svg:y="18.687cm">
          <draw:text-box>
            <text:p text:style-name="P1"><text:span text:style-name="T2">base <text:s/>local <text:s/>tal <text:s/>vez <text:s/>eso <text:s/>no <text:s/>se <text:s/>nota <text:s/>tanto, <text:s/>pero <text:s/>en <text:s/>una <text:s/>distribuida <text:s/>la <text:s/>red <text:s/>es <text:s/>una <text:s/>parte <text:s/>muy </text:span></text:p>
          </draw:text-box>
        </draw:frame>
        <draw:frame draw:style-name="gr1" draw:text-style-name="P2" draw:layer="layout" svg:width="2.048cm" svg:height="0.471cm" svg:x="2.541cm" svg:y="19.252cm">
          <draw:text-box>
            <text:p text:style-name="P1"><text:span text:style-name="T2">importante. </text:span></text:p>
          </draw:text-box>
        </draw:frame>
        <draw:frame draw:style-name="gr1" draw:text-style-name="P2" draw:layer="layout" svg:width="14.378cm" svg:height="0.471cm" svg:x="3.794cm" svg:y="20.099cm">
          <draw:text-box>
            <text:p text:style-name="P1"><text:span text:style-name="T2">La seguridad también se vuelve más delicada. Al haber varias bases conectadas, hay </text:span></text:p>
          </draw:text-box>
        </draw:frame>
        <draw:frame draw:style-name="gr1" draw:text-style-name="P2" draw:layer="layout" svg:width="16.073cm" svg:height="0.471cm" svg:x="2.541cm" svg:y="20.672cm">
          <draw:text-box>
            <text:p text:style-name="P1"><text:span text:style-name="T2">que cuidar mejor los usuarios, contraseñas, permisos y accesos. Si no se configura bien, puede </text:span></text:p>
          </draw:text-box>
        </draw:frame>
        <draw:frame draw:style-name="gr1" draw:text-style-name="P2" draw:layer="layout" svg:width="5.762cm" svg:height="0.471cm" svg:x="2.541cm" svg:y="21.236cm">
          <draw:text-box>
            <text:p text:style-name="P1"><text:span text:style-name="T2">haber riesgos con la información. </text:span></text:p>
          </draw:text-box>
        </draw:frame>
        <draw:frame draw:style-name="gr1" draw:text-style-name="P2" draw:layer="layout" svg:width="14.872cm" svg:height="0.471cm" svg:x="3.794cm" svg:y="22.083cm">
          <draw:text-box>
            <text:p text:style-name="P1"><text:span text:style-name="T2">Otra desventaja es el costo. Una base distribuida puede necesitar más servidores, mejor </text:span></text:p>
          </draw:text-box>
        </draw:frame>
        <draw:frame draw:style-name="gr1" draw:text-style-name="P2" draw:layer="layout" svg:width="15.92cm" svg:height="0.471cm" svg:x="2.541cm" svg:y="22.649cm">
          <draw:text-box>
            <text:p text:style-name="P1"><text:span text:style-name="T2">conexión, mantenimiento y personas que sepan configurarla bien. Por eso, para sistemas muy </text:span></text:p>
          </draw:text-box>
        </draw:frame>
        <draw:frame draw:style-name="gr1" draw:text-style-name="P2" draw:layer="layout" svg:width="10.075cm" svg:height="0.471cm" svg:x="2.541cm" svg:y="23.213cm">
          <draw:text-box>
            <text:p text:style-name="P1"><text:span text:style-name="T2">pequeños, a veces no vale la pena hacer algo tan complejo. </text:span></text:p>
          </draw:text-box>
        </draw:frame>
        <draw:frame draw:style-name="gr1" draw:text-style-name="P2" draw:layer="layout" svg:width="14.263cm" svg:height="0.471cm" svg:x="3.794cm" svg:y="24.06cm">
          <draw:text-box>
            <text:p text:style-name="P1"><text:span text:style-name="T2">También los respaldos pueden ser más complicados. Como los datos no están en un </text:span></text:p>
          </draw:text-box>
        </draw:frame>
        <draw:frame draw:style-name="gr1" draw:text-style-name="P2" draw:layer="layout" svg:width="16.118cm" svg:height="0.471cm" svg:x="2.541cm" svg:y="24.633cm">
          <draw:text-box>
            <text:p text:style-name="P1"><text:span text:style-name="T2">solo lugar, hay que asegurarse de que cada base tenga sus copias de seguridad y que se puedan </text:span></text:p>
          </draw:text-box>
        </draw:frame>
        <draw:frame draw:style-name="gr1" draw:text-style-name="P2" draw:layer="layout" svg:width="6.643cm" svg:height="0.471cm" svg:x="2.541cm" svg:y="25.197cm">
          <draw:text-box>
            <text:p text:style-name="P1"><text:span text:style-name="T2">recuperar bien si pasa algún problema. </text:span></text:p>
          </draw:text-box>
        </draw:frame>
        <draw:frame draw:style-name="gr1" draw:text-style-name="P2" draw:layer="layout" svg:width="14.251cm" svg:height="0.471cm" svg:x="3.794cm" svg:y="26.045cm">
          <draw:text-box>
            <text:p text:style-name="P1"><text:span text:style-name="T2">En conclusión, las bases de datos distribuidas son útiles cuando se necesita manejar </text:span></text:p>
          </draw:text-box>
        </draw:frame>
        <draw:frame draw:style-name="gr1" draw:text-style-name="P2" draw:layer="layout" svg:width="15.883cm" svg:height="0.471cm" svg:x="2.541cm" svg:y="26.609cm">
          <draw:text-box>
            <text:p text:style-name="P1"><text:span text:style-name="T2">información en diferentes lugares, como varias sedes o servidores. Ayudan a organizar mejor </text:span></text:p>
          </draw:text-box>
        </draw:frame>
      </draw:page>
      <draw:page draw:name="page9" draw:style-name="dp1" draw:master-page-name="master-page3">
        <draw:frame draw:style-name="gr1" draw:text-style-name="P2" draw:layer="layout" svg:width="0.422cm" svg:height="0.497cm" svg:x="2.532cm" svg:y="1.275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97cm" svg:x="10.5cm" svg:y="1.275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97cm" svg:x="18.238cm" svg:y="1.275cm">
          <draw:text-box>
            <text:p text:style-name="P1"><text:span text:style-name="T1">9 </text:span></text:p>
          </draw:text-box>
        </draw:frame>
        <draw:frame draw:style-name="gr1" draw:text-style-name="P2" draw:layer="layout" svg:width="0.422cm" svg:height="0.497cm" svg:x="2.541cm" svg:y="1.804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97cm" svg:x="2.532cm" svg:y="27.396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97cm" svg:x="10.5cm" svg:y="27.396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97cm" svg:x="18.467cm" svg:y="27.396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97cm" svg:x="2.541cm" svg:y="27.926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16.06cm" svg:height="0.471cm" svg:x="2.541cm" svg:y="2.561cm">
          <draw:text-box>
            <text:p text:style-name="P1"><text:span text:style-name="T2">los datos, mejorar la disponibilidad y hacer que el sistema pueda crecer. Pero también hay que </text:span></text:p>
          </draw:text-box>
        </draw:frame>
        <draw:frame draw:style-name="gr1" draw:text-style-name="P2" draw:layer="layout" svg:width="0.954cm" svg:height="0.471cm" svg:x="2.541cm" svg:y="3.125cm">
          <draw:text-box>
            <text:p text:style-name="P1"><text:span text:style-name="T2">tener </text:span></text:p>
          </draw:text-box>
        </draw:frame>
        <draw:frame draw:style-name="gr1" draw:text-style-name="P2" draw:layer="layout" svg:width="1.554cm" svg:height="0.471cm" svg:x="3.678cm" svg:y="3.125cm">
          <draw:text-box>
            <text:p text:style-name="P1"><text:span text:style-name="T2">cuidado, </text:span></text:p>
          </draw:text-box>
        </draw:frame>
        <draw:frame draw:style-name="gr1" draw:text-style-name="P2" draw:layer="layout" svg:width="1.283cm" svg:height="0.471cm" svg:x="5.414cm" svg:y="3.125cm">
          <draw:text-box>
            <text:p text:style-name="P1"><text:span text:style-name="T2">porque </text:span></text:p>
          </draw:text-box>
        </draw:frame>
        <draw:frame draw:style-name="gr1" draw:text-style-name="P2" draw:layer="layout" svg:width="1.33cm" svg:height="0.471cm" svg:x="6.887cm" svg:y="3.125cm">
          <draw:text-box>
            <text:p text:style-name="P1"><text:span text:style-name="T2">pueden </text:span></text:p>
          </draw:text-box>
        </draw:frame>
        <draw:frame draw:style-name="gr1" draw:text-style-name="P2" draw:layer="layout" svg:width="1.541cm" svg:height="0.471cm" svg:x="8.403cm" svg:y="3.125cm">
          <draw:text-box>
            <text:p text:style-name="P1"><text:span text:style-name="T2">aparecer </text:span></text:p>
          </draw:text-box>
        </draw:frame>
        <draw:frame draw:style-name="gr1" draw:text-style-name="P2" draw:layer="layout" svg:width="1.871cm" svg:height="0.471cm" svg:x="10.13cm" svg:y="3.125cm">
          <draw:text-box>
            <text:p text:style-name="P1"><text:span text:style-name="T2">problemas </text:span></text:p>
          </draw:text-box>
        </draw:frame>
        <draw:frame draw:style-name="gr1" draw:text-style-name="P2" draw:layer="layout" svg:width="0.507cm" svg:height="0.471cm" svg:x="12.2cm" svg:y="3.125cm">
          <draw:text-box>
            <text:p text:style-name="P1"><text:span text:style-name="T2">de </text:span></text:p>
          </draw:text-box>
        </draw:frame>
        <draw:frame draw:style-name="gr1" draw:text-style-name="P2" draw:layer="layout" svg:width="2.283cm" svg:height="0.471cm" svg:x="12.896cm" svg:y="3.125cm">
          <draw:text-box>
            <text:p text:style-name="P1"><text:span text:style-name="T2">consistencia, </text:span></text:p>
          </draw:text-box>
        </draw:frame>
        <draw:frame draw:style-name="gr1" draw:text-style-name="P2" draw:layer="layout" svg:width="0.754cm" svg:height="0.471cm" svg:x="15.355cm" svg:y="3.125cm">
          <draw:text-box>
            <text:p text:style-name="P1"><text:span text:style-name="T2">red, </text:span></text:p>
          </draw:text-box>
        </draw:frame>
        <draw:frame draw:style-name="gr1" draw:text-style-name="P2" draw:layer="layout" svg:width="1.754cm" svg:height="0.471cm" svg:x="16.298cm" svg:y="3.125cm">
          <draw:text-box>
            <text:p text:style-name="P1"><text:span text:style-name="T2">seguridad </text:span></text:p>
          </draw:text-box>
        </draw:frame>
        <draw:frame draw:style-name="gr1" draw:text-style-name="P2" draw:layer="layout" svg:width="0.422cm" svg:height="0.471cm" svg:x="18.237cm" svg:y="3.125cm">
          <draw:text-box>
            <text:p text:style-name="P1"><text:span text:style-name="T2">y </text:span></text:p>
          </draw:text-box>
        </draw:frame>
        <draw:frame draw:style-name="gr1" draw:text-style-name="P2" draw:layer="layout" svg:width="2.753cm" svg:height="0.471cm" svg:x="2.541cm" svg:y="3.69cm">
          <draw:text-box>
            <text:p text:style-name="P1"><text:span text:style-name="T2">mantenimiento. </text:span></text:p>
          </draw:text-box>
        </draw:frame>
        <draw:frame draw:style-name="gr1" draw:text-style-name="P2" draw:layer="layout" svg:width="2.131cm" svg:height="0.471cm" svg:x="2.541cm" svg:y="4.89cm">
          <draw:text-box>
            <text:p text:style-name="P1"><text:span text:style-name="T3">Conclusión </text:span></text:p>
          </draw:text-box>
        </draw:frame>
        <draw:frame draw:style-name="gr1" draw:text-style-name="P2" draw:layer="layout" svg:width="16.132cm" svg:height="0.471cm" svg:x="2.541cm" svg:y="5.604cm">
          <draw:text-box>
            <text:p text:style-name="P1"><text:span text:style-name="T2">Las bases de datos distribuidas son una solución muy importante para los sistemas actuales, ya </text:span></text:p>
          </draw:text-box>
        </draw:frame>
        <draw:frame draw:style-name="gr1" draw:text-style-name="P2" draw:layer="layout" svg:width="16cm" svg:height="0.471cm" svg:x="2.541cm" svg:y="6.169cm">
          <draw:text-box>
            <text:p text:style-name="P1"><text:span text:style-name="T2">que permiten manejar grandes cantidades de información en diferentes lugares y mantener los </text:span></text:p>
          </draw:text-box>
        </draw:frame>
        <draw:frame draw:style-name="gr1" draw:text-style-name="P2" draw:layer="layout" svg:width="16.191cm" svg:height="0.471cm" svg:x="2.541cm" svg:y="6.733cm">
          <draw:text-box>
            <text:p text:style-name="P1"><text:span text:style-name="T2">servicios disponibles para muchos usuarios. Su principal objetivo es que los datos puedan estar </text:span></text:p>
          </draw:text-box>
        </draw:frame>
        <draw:frame draw:style-name="gr1" draw:text-style-name="P2" draw:layer="layout" svg:width="16.178cm" svg:height="0.471cm" svg:x="2.541cm" svg:y="7.299cm">
          <draw:text-box>
            <text:p text:style-name="P1"><text:span text:style-name="T2">repartidos en varios servidores, pero que el usuario los vea como si estuvieran en una sola base </text:span></text:p>
          </draw:text-box>
        </draw:frame>
        <draw:frame draw:style-name="gr1" draw:text-style-name="P2" draw:layer="layout" svg:width="1.613cm" svg:height="0.471cm" svg:x="2.541cm" svg:y="7.863cm">
          <draw:text-box>
            <text:p text:style-name="P1"><text:span text:style-name="T2">de datos. </text:span></text:p>
          </draw:text-box>
        </draw:frame>
        <draw:frame draw:style-name="gr1" draw:text-style-name="P2" draw:layer="layout" svg:width="0.837cm" svg:height="0.471cm" svg:x="2.541cm" svg:y="8.709cm">
          <draw:text-box>
            <text:p text:style-name="P1"><text:span text:style-name="T2">Este </text:span></text:p>
          </draw:text-box>
        </draw:frame>
        <draw:frame draw:style-name="gr1" draw:text-style-name="P2" draw:layer="layout" svg:width="0.766cm" svg:height="0.471cm" svg:x="3.528cm" svg:y="8.709cm">
          <draw:text-box>
            <text:p text:style-name="P1"><text:span text:style-name="T2">tipo </text:span></text:p>
          </draw:text-box>
        </draw:frame>
        <draw:frame draw:style-name="gr1" draw:text-style-name="P2" draw:layer="layout" svg:width="0.507cm" svg:height="0.471cm" svg:x="4.453cm" svg:y="8.709cm">
          <draw:text-box>
            <text:p text:style-name="P1"><text:span text:style-name="T2">de </text:span></text:p>
          </draw:text-box>
        </draw:frame>
        <draw:frame draw:style-name="gr1" draw:text-style-name="P2" draw:layer="layout" svg:width="0.86cm" svg:height="0.471cm" svg:x="5.122cm" svg:y="8.709cm">
          <draw:text-box>
            <text:p text:style-name="P1"><text:span text:style-name="T2">base </text:span></text:p>
          </draw:text-box>
        </draw:frame>
        <draw:frame draw:style-name="gr1" draw:text-style-name="P2" draw:layer="layout" svg:width="0.507cm" svg:height="0.471cm" svg:x="6.135cm" svg:y="8.709cm">
          <draw:text-box>
            <text:p text:style-name="P1"><text:span text:style-name="T2">de </text:span></text:p>
          </draw:text-box>
        </draw:frame>
        <draw:frame draw:style-name="gr1" draw:text-style-name="P2" draw:layer="layout" svg:width="1.001cm" svg:height="0.471cm" svg:x="6.805cm" svg:y="8.709cm">
          <draw:text-box>
            <text:p text:style-name="P1"><text:span text:style-name="T2">datos </text:span></text:p>
          </draw:text-box>
        </draw:frame>
        <draw:frame draw:style-name="gr1" draw:text-style-name="P2" draw:layer="layout" svg:width="1.165cm" svg:height="0.471cm" svg:x="7.968cm" svg:y="8.709cm">
          <draw:text-box>
            <text:p text:style-name="P1"><text:span text:style-name="T2">ofrece </text:span></text:p>
          </draw:text-box>
        </draw:frame>
        <draw:frame draw:style-name="gr1" draw:text-style-name="P2" draw:layer="layout" svg:width="1.495cm" svg:height="0.471cm" svg:x="9.289cm" svg:y="8.709cm">
          <draw:text-box>
            <text:p text:style-name="P1"><text:span text:style-name="T2">ventajas </text:span></text:p>
          </draw:text-box>
        </draw:frame>
        <draw:frame draw:style-name="gr1" draw:text-style-name="P2" draw:layer="layout" svg:width="1.048cm" svg:height="0.471cm" svg:x="10.946cm" svg:y="8.709cm">
          <draw:text-box>
            <text:p text:style-name="P1"><text:span text:style-name="T2">como </text:span></text:p>
          </draw:text-box>
        </draw:frame>
        <draw:frame draw:style-name="gr1" draw:text-style-name="P2" draw:layer="layout" svg:width="1.189cm" svg:height="0.471cm" svg:x="12.153cm" svg:y="8.709cm">
          <draw:text-box>
            <text:p text:style-name="P1"><text:span text:style-name="T2">mayor </text:span></text:p>
          </draw:text-box>
        </draw:frame>
        <draw:frame draw:style-name="gr1" draw:text-style-name="P2" draw:layer="layout" svg:width="2.259cm" svg:height="0.471cm" svg:x="13.501cm" svg:y="8.709cm">
          <draw:text-box>
            <text:p text:style-name="P1"><text:span text:style-name="T2">rendimiento, </text:span></text:p>
          </draw:text-box>
        </draw:frame>
        <draw:frame draw:style-name="gr1" draw:text-style-name="P2" draw:layer="layout" svg:width="2.636cm" svg:height="0.471cm" svg:x="15.917cm" svg:y="8.709cm">
          <draw:text-box>
            <text:p text:style-name="P1"><text:span text:style-name="T2">disponibilidad, </text:span></text:p>
          </draw:text-box>
        </draw:frame>
        <draw:frame draw:style-name="gr1" draw:text-style-name="P2" draw:layer="layout" svg:width="16.483cm" svg:height="0.471cm" svg:x="2.541cm" svg:y="9.283cm">
          <draw:text-box>
            <text:p text:style-name="P1"><text:span text:style-name="T2">escalabilidad <text:s/>y <text:s/>tolerancia <text:s/>a <text:s/>fallos. <text:s/>Sin <text:s/>embargo, <text:s/>también <text:s/>tiene <text:s/>retos <text:s/>importantes, <text:s/>como <text:s/>la </text:span></text:p>
          </draw:text-box>
        </draw:frame>
        <draw:frame draw:style-name="gr1" draw:text-style-name="P2" draw:layer="layout" svg:width="15.449cm" svg:height="0.471cm" svg:x="2.541cm" svg:y="9.847cm">
          <draw:text-box>
            <text:p text:style-name="P1"><text:span text:style-name="T2">sincronización de datos, la seguridad, la administración y la consistencia. Por eso, antes de </text:span></text:p>
          </draw:text-box>
        </draw:frame>
        <draw:frame draw:style-name="gr1" draw:text-style-name="P2" draw:layer="layout" svg:width="16.389cm" svg:height="0.471cm" svg:x="2.541cm" svg:y="10.413cm">
          <draw:text-box>
            <text:p text:style-name="P1"><text:span text:style-name="T2">implementar <text:s/>una <text:s/>base <text:s/>de <text:s/>datos <text:s/>distribuida, <text:s/>es <text:s/>necesario <text:s/>analizar <text:s/>bien <text:s/>las <text:s/>necesidades <text:s/>del </text:span></text:p>
          </draw:text-box>
        </draw:frame>
        <draw:frame draw:style-name="gr1" draw:text-style-name="P2" draw:layer="layout" svg:width="1.483cm" svg:height="0.471cm" svg:x="2.541cm" svg:y="10.977cm">
          <draw:text-box>
            <text:p text:style-name="P1"><text:span text:style-name="T2">sistema. </text:span></text:p>
          </draw:text-box>
        </draw:frame>
        <draw:frame draw:style-name="gr1" draw:text-style-name="P2" draw:layer="layout" svg:width="15.907cm" svg:height="0.471cm" svg:x="2.541cm" svg:y="11.824cm">
          <draw:text-box>
            <text:p text:style-name="P1"><text:span text:style-name="T2">En general, las bases de datos distribuidas son una parte fundamental de muchas aplicaciones </text:span></text:p>
          </draw:text-box>
        </draw:frame>
        <draw:frame draw:style-name="gr1" draw:text-style-name="P2" draw:layer="layout" svg:width="16.33cm" svg:height="0.471cm" svg:x="2.541cm" svg:y="12.388cm">
          <draw:text-box>
            <text:p text:style-name="P1"><text:span text:style-name="T2">modernas, <text:s/>especialmente <text:s/>aquellas <text:s/>que <text:s/>trabajan <text:s/>en <text:s/>internet, <text:s/>en <text:s/>la <text:s/>nube <text:s/>o <text:s/>con <text:s/>usuarios <text:s/>de </text:span></text:p>
          </draw:text-box>
        </draw:frame>
        <draw:frame draw:style-name="gr1" draw:text-style-name="P2" draw:layer="layout" svg:width="3.423cm" svg:height="0.471cm" svg:x="2.541cm" svg:y="12.961cm">
          <draw:text-box>
            <text:p text:style-name="P1"><text:span text:style-name="T2">diferentes regiones. </text:span></text:p>
          </draw:text-box>
        </draw:frame>
        <draw:frame draw:style-name="gr1" draw:text-style-name="P2" draw:layer="layout" svg:width="0.422cm" svg:height="0.497cm" svg:x="2.541cm" svg:y="13.793cm">
          <draw:text-box>
            <text:p text:style-name="P1"><text:span text:style-name="T1"><text:s/>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ptos" svg:font-family="Aptos"/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Rellena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Rellenado_20_amarillo" draw:display-name="Rellenado amaril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Rellenado_20_azul" draw:display-name="Rellena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Rellenado_20_rojo" draw:display-name="Rellenado roj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Rellenado_20_verde" draw:display-name="Rellena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C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.2cm" fo:margin-bottom="1cm" fo:margin-left="2.5cm" fo:margin-right="1cm" fo:page-width="20.999cm" fo:page-height="29.70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document-statistic meta:object-count="485"/>
    <meta:generator>LibreOffice/25.8.7.3$Windows_X86_64 LibreOffice_project/30742500f2d3eb4366ac312fa33d3dcabdb3eba5</meta:generator>
  </office:meta>
</office:document-meta>
</file>